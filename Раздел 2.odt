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20000005E81138C8B4751E23E.png" manifest:media-type="image/png"/>
  <manifest:file-entry manifest:full-path="Pictures/1000000100000290000000BC0232B224270D28D9.png" manifest:media-type="image/png"/>
  <manifest:file-entry manifest:full-path="Pictures/10000001000002AA00000035DBF45DE4661012EE.png" manifest:media-type="image/png"/>
  <manifest:file-entry manifest:full-path="Pictures/1000000100000290000003E1D769AA4912378C2F.png" manifest:media-type="image/png"/>
  <manifest:file-entry manifest:full-path="Pictures/10000001000006FB000001B688B4A138048FF9E4.png" manifest:media-type="image/png"/>
  <manifest:file-entry manifest:full-path="Pictures/100000010000029000000332000316E17B5F3419.png" manifest:media-type="image/png"/>
  <manifest:file-entry manifest:full-path="Pictures/10000001000005B40000004ADCFC0BAE32D844AF.png" manifest:media-type="image/png"/>
  <manifest:file-entry manifest:full-path="Pictures/10000001000001B0000000489DB31AAF72D8333F.png" manifest:media-type="image/png"/>
  <manifest:file-entry manifest:full-path="Pictures/10000001000002890000005190DE29001EA1DD03.png" manifest:media-type="image/png"/>
  <manifest:file-entry manifest:full-path="Pictures/10000001000003E4000000654433BCD6551EAD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d008e" officeooo:paragraph-rsid="001d008e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d008e" officeooo:paragraph-rsid="001d008e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d8f3e" officeooo:paragraph-rsid="001d8f3e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f8018" officeooo:paragraph-rsid="001f8018" style:font-size-asian="12.25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здел 2</text:p>
      <text:p text:style-name="P2">1 ) screen -S "$(whoami)_part2" -L -Logfile "${USER}_part.log"</text:p>
      <text:p text:style-name="P2">2)</text:p>
      <text:p text:style-name="P2"><draw:frame draw:style-name="fr1" draw:name="Image1" text:anchor-type="char" svg:width="6.6929in" svg:height="0.6783in" draw:z-index="0"><draw:image xlink:href="Pictures/10000001000003E4000000654433BCD6551EAD09.png" xlink:type="simple" xlink:show="embed" xlink:actuate="onLoad" draw:mime-type="image/png"/></draw:frame>3)</text:p>
      <text:p text:style-name="P2"><draw:frame draw:style-name="fr1" draw:name="Image2" text:anchor-type="char" svg:width="6.6929in" svg:height="0.8346in" draw:z-index="1"><draw:image xlink:href="Pictures/10000001000002890000005190DE29001EA1DD03.png" xlink:type="simple" xlink:show="embed" xlink:actuate="onLoad" draw:mime-type="image/png"/></draw:frame>4)</text:p>
      <text:p text:style-name="P2"><draw:frame draw:style-name="fr4" draw:name="Image3" text:anchor-type="as-char" svg:width="4.5in" svg:height="0.75in" draw:z-index="2"><draw:image xlink:href="Pictures/10000001000001B0000000489DB31AAF72D8333F.png" xlink:type="simple" xlink:show="embed" xlink:actuate="onLoad" draw:mime-type="image/png"/></draw:frame></text:p>
      <text:p text:style-name="P2">5)</text:p>
      <text:p text:style-name="P2"><draw:frame draw:style-name="fr3" draw:name="Image4" text:anchor-type="char" svg:width="6.6929in" svg:height="0.339in" draw:z-index="3"><draw:image xlink:href="Pictures/10000001000005B40000004ADCFC0BAE32D844AF.png" xlink:type="simple" xlink:show="embed" xlink:actuate="onLoad" draw:mime-type="image/png"/></draw:frame>eltex-v44@eltex-2026-summer:~$ ls -d ~/.*</text:p>
      <text:p text:style-name="P2">/home/eltex-v44/.bash_history <text:s/>/home/eltex-v44/.bash_logout <text:s/>/home/eltex-v44/.bashrc <text:s/>/home/eltex-v44/.config <text:s/>/home/eltex-v44/.profile <text:s/>/home/eltex-v44/.viminfo</text:p>
      <text:p text:style-name="P2">6)</text:p>
      <text:p text:style-name="P2"><draw:frame draw:style-name="fr2" draw:name="Image5" text:anchor-type="char" svg:width="6.6929in" svg:height="8.3457in" draw:z-index="4"><draw:image xlink:href="Pictures/100000010000029000000332000316E17B5F3419.png" xlink:type="simple" xlink:show="embed" xlink:actuate="onLoad" draw:mime-type="image/png"/></draw:frame><text:soft-page-break/>eltex-v44@eltex-2026-summer:~$ export HISTTIMEFORMAT="%d.%m.%y %T "~</text:p>
      <text:p text:style-name="P2">eltex-v44@eltex-2026-summer:~$ hisory</text:p>
      <text:p text:style-name="P2">bash: hisory: command not found</text:p>
      <text:p text:style-name="P2">eltex-v44@eltex-2026-summer:~$ history</text:p>
      <text:p text:style-name="P2"><text:s text:c="4"/>1 <text:s/>06.07.26 14:16:43 ~ls</text:p>
      <text:p text:style-name="P2"><text:s text:c="4"/>2 <text:s/>06.07.26 14:16:43 ~export LANG=ru_RU.UTF-8</text:p>
      <text:p text:style-name="P2"><text:s text:c="4"/>3 <text:s/>06.07.26 14:16:43 ~ls</text:p>
      <text:p text:style-name="P2"><text:soft-page-break/><text:s text:c="4"/>4 <text:s/>06.07.26 14:16:43 ~screen</text:p>
      <text:p text:style-name="P2"><text:s text:c="4"/>5 <text:s/>06.07.26 14:16:43 ~screen -S top -d -m top</text:p>
      <text:p text:style-name="P2"><text:s text:c="4"/>6 <text:s/>06.07.26 14:16:43 ~screen -ls</text:p>
      <text:p text:style-name="P2"><text:s text:c="4"/>7 <text:s/>06.07.26 14:16:43 ~screen -r top</text:p>
      <text:p text:style-name="P2"><text:s text:c="4"/>8 <text:s/>06.07.26 14:16:43 ~screen -S report -m vi report_part1.txt</text:p>
      <text:p text:style-name="P2"><text:s text:c="4"/>9 <text:s/>06.07.26 14:16:43 ~d</text:p>
      <text:p text:style-name="P2"><text:s text:c="3"/>10 <text:s/>06.07.26 14:16:43 ~screen -S report -m vi report_part1.txt</text:p>
      <text:p text:style-name="P2"><text:s text:c="3"/>11 <text:s/>06.07.26 14:16:43 ~screen -ls</text:p>
      <text:p text:style-name="P2"><text:s text:c="3"/>12 <text:s/>06.07.26 14:16:43 ~screen -r report</text:p>
      <text:p text:style-name="P2"><text:s text:c="3"/>13 <text:s/>06.07.26 14:16:43 ~exit</text:p>
      <text:p text:style-name="P2"><text:s text:c="3"/>14 <text:s/>06.07.26 14:16:43 ~watch /usr/bin/vmstat</text:p>
      <text:p text:style-name="P2"><text:s text:c="3"/>15 <text:s/>06.07.26 14:16:43 ~exit</text:p>
      <text:p text:style-name="P2"><text:s text:c="3"/>16 <text:s/>06.07.26 14:16:43 ~w</text:p>
      <text:p text:style-name="P2"><text:s text:c="3"/>17 <text:s/>06.07.26 14:16:43 ~exit</text:p>
      <text:p text:style-name="P2"><text:s text:c="3"/>18 <text:s/>06.07.26 14:16:43 ~w</text:p>
      <text:p text:style-name="P2"><text:s text:c="3"/>19 <text:s/>06.07.26 14:16:43 ~screen</text:p>
      <text:p text:style-name="P2"><text:s text:c="3"/>20 <text:s/>06.07.26 14:16:43 ~screen -ls</text:p>
      <text:p text:style-name="P2"><text:s text:c="3"/>21 <text:s/>06.07.26 14:16:43 ~screen -r 23834</text:p>
      <text:p text:style-name="P2"><text:s text:c="3"/>22 <text:s/>06.07.26 14:16:43 ~screen -ls</text:p>
      <text:p text:style-name="P2"><text:s text:c="3"/>23 <text:s/>06.07.26 14:16:43 ~exit</text:p>
      <text:p text:style-name="P2"><text:s text:c="3"/>24 <text:s/>06.07.26 14:16:43 ~w</text:p>
      <text:p text:style-name="P2"><text:s text:c="3"/>25 <text:s/>06.07.26 14:16:43 ~screen -S top -d -m top</text:p>
      <text:p text:style-name="P2"><text:s text:c="3"/>26 <text:s/>06.07.26 14:16:43 ~screen -ls</text:p>
      <text:p text:style-name="P2"><text:s text:c="3"/>27 <text:s/>06.07.26 14:16:43 ~screen -r top</text:p>
      <text:p text:style-name="P2"><text:s text:c="3"/>28 <text:s/>06.07.26 14:16:43 ~watch</text:p>
      <text:p text:style-name="P2"><text:s text:c="3"/>29 <text:s/>06.07.26 14:16:43 ~watch /usr/bin/vmstat</text:p>
      <text:p text:style-name="P2"><text:s text:c="3"/>30 <text:s/>06.07.26 14:16:43 ~screen</text:p>
      <text:p text:style-name="P2"><text:s text:c="3"/>31 <text:s/>06.07.26 14:16:43 ~screen -ls</text:p>
      <text:p text:style-name="P2"><text:s text:c="3"/>32 <text:s/>06.07.26 14:16:43 ~exit</text:p>
      <text:p text:style-name="P2"><text:s text:c="3"/>33 <text:s/>06.07.26 14:16:43 ~screen</text:p>
      <text:p text:style-name="P2"><text:s text:c="3"/>34 <text:s/>06.07.26 14:16:43 ~screen -ls</text:p>
      <text:p text:style-name="P2"><text:s text:c="3"/>35 <text:s/>06.07.26 14:16:43 ~exit</text:p>
      <text:p text:style-name="P2"><text:s text:c="3"/>36 <text:s/>06.07.26 14:19:48 ~echo $HISTSIZE</text:p>
      <text:p text:style-name="P2"><text:s text:c="3"/>37 <text:s/>06.07.26 14:20:46 ~ls -d ~/.*</text:p>
      <text:p text:style-name="P2"><text:s text:c="3"/>38 <text:s/>06.07.26 14:22:34 ~export HISTTIMEFORMAT="%d.%m.%y %T "~</text:p>
      <text:p text:style-name="P2"><text:s text:c="3"/>39 <text:s/>06.07.26 14:22:44 ~hisory</text:p>
      <text:p text:style-name="P2"><text:s text:c="3"/>40 <text:s/>06.07.26 14:22:49 ~history</text:p>
      <text:p text:style-name="P2">7)</text:p>
      <text:p text:style-name="P2"/>
      <text:p text:style-name="P2"/>
      <text:p text:style-name="P2"/>
      <text:p text:style-name="P2"/>
      <text:p text:style-name="P2"><draw:frame draw:style-name="fr2" draw:name="Image6" text:anchor-type="char" svg:width="6.6929in" svg:height="10.1311in" draw:z-index="5"><draw:image xlink:href="Pictures/1000000100000290000003E1D769AA4912378C2F.png" xlink:type="simple" xlink:show="embed" xlink:actuate="onLoad" draw:mime-type="image/png"/></draw:frame><text:soft-page-break/>eltex-v44@eltex-2026-summer:~$ date</text:p>
      <text:p text:style-name="P2">Пн 06 июл 2026 14:24:41 +07</text:p>
      <text:p text:style-name="P2">eltex-v44@eltex-2026-summer:~$ export PROMPT_COMMAND="history -a"</text:p>
      <text:p text:style-name="P2">eltex-v44@eltex-2026-summer:~$ echo $PROMPT_COMMAND</text:p>
      <text:p text:style-name="P2">history -a</text:p>
      <text:p text:style-name="P2">eltex-v44@eltex-2026-summer:~$ echo "ПРОВЕРКА_ИСТОРИИ_123"</text:p>
      <text:p text:style-name="P2">ПРОВЕРКА_ИСТОРИИ_123</text:p>
      <text:p text:style-name="P2">eltex-v44@eltex-2026-summer:~$ tail -n 5 ~/.bash_history</text:p>
      <text:p text:style-name="P2">export PROMPT_COMMAND="history -a"</text:p>
      <text:p text:style-name="P2">#1783322974</text:p>
      <text:p text:style-name="P2">echo $PROMPT_COMMAND</text:p>
      <text:p text:style-name="P2">#1783322998</text:p>
      <text:p text:style-name="P2">echo "ПРОВЕРКА_ИСТОРИИ_123"</text:p>
      <text:p text:style-name="P2">eltex-v44@eltex-2026-summer:~$ </text:p>
      <text:p text:style-name="P2"/>
      <text:p text:style-name="P3">10-12)</text:p>
      <text:p text:style-name="P3"><draw:frame draw:style-name="fr1" draw:name="Image7" text:anchor-type="char" svg:width="6.6929in" svg:height="1.9181in" draw:z-index="6"><draw:image xlink:href="Pictures/1000000100000290000000BC0232B224270D28D9.png" xlink:type="simple" xlink:show="embed" xlink:actuate="onLoad" draw:mime-type="image/png"/></draw:frame>eltex-v44@eltex-2026-summer:~$ DATE=$(date +%d.%m.%Y)</text:p>
      <text:p text:style-name="P3">echo $DATE</text:p>
      <text:p text:style-name="P3">06.07.2026</text:p>
      <text:p text:style-name="P3">eltex-v44@eltex-2026-summer:~$ TIME=$(date +%H:%M:%S)</text:p>
      <text:p text:style-name="P3">echo $TIME</text:p>
      <text:p text:style-name="P3">14:32:39</text:p>
      <text:p text:style-name="P3">eltex-v44@eltex-2026-summer:~$ DATE_TIME="$DATE $TIME"</text:p>
      <text:p text:style-name="P3">echo $DATE_TIME</text:p>
      <text:p text:style-name="P3">06.07.2026 14:32:39</text:p>
      <text:p text:style-name="P3">13)</text:p>
      <text:p text:style-name="P3"><draw:frame draw:style-name="fr1" draw:name="Image8" text:anchor-type="char" svg:width="6.6929in" svg:height="1.6402in" draw:z-index="7"><draw:image xlink:href="Pictures/10000001000006FB000001B688B4A138048FF9E4.png" xlink:type="simple" xlink:show="embed" xlink:actuate="onLoad" draw:mime-type="image/png"/></draw:frame><draw:frame draw:style-name="fr1" draw:name="Image9" text:anchor-type="char" svg:width="6.6929in" svg:height="1.6402in" draw:z-index="8"><draw:image xlink:href="Pictures/10000001000006FB000001B688B4A138048FF9E4.png" xlink:type="simple" xlink:show="embed" xlink:actuate="onLoad" draw:mime-type="image/png"/></draw:frame></text:p>
      <text:p text:style-name="P3">eltex-v44@eltex-2026-summer:~$ ls /bin/*[0-9]* /sbin/*[0-9]*</text:p>
      <text:p text:style-name="P3"><text:soft-page-break/>/bin/addr2line <text:s text:c="17"/>/bin/grub-menulst2cfg <text:s text:c="10"/>/bin/py3clean <text:s text:c="19"/>/bin/x86_64-linux-gnu-c++filt <text:s text:c="8"/>/bin/x86_64-linux-gnu-gp-display-html <text:s/>/sbin/e2label</text:p>
      <text:p text:style-name="P3">/bin/b2sum <text:s text:c="21"/>/bin/grub-mkpasswd-pbkdf2 <text:s text:c="6"/>/bin/py3compile <text:s text:c="17"/>/bin/x86_64-linux-gnu-cpp <text:s text:c="12"/>/bin/x86_64-linux-gnu-gp-display-src <text:s text:c="2"/>/sbin/e2mmpstatus</text:p>
      <text:p text:style-name="P3">/bin/base32 <text:s text:c="20"/>/bin/grub-syslinux2cfg <text:s text:c="9"/>/bin/py3versions <text:s text:c="16"/>/bin/x86_64-linux-gnu-cpp-12 <text:s text:c="9"/>/bin/x86_64-linux-gnu-gp-display-text <text:s/>/sbin/e2scrub</text:p>
      <text:p text:style-name="P3">/bin/base64 <text:s text:c="20"/>/bin/h2ph <text:s text:c="22"/>/bin/pydoc3 <text:s text:c="21"/>/bin/x86_64-linux-gnu-dwp <text:s text:c="12"/>/bin/x86_64-linux-gnu-gprof <text:s text:c="11"/>/sbin/e2scrub_all</text:p>
      <text:p text:style-name="P3">/bin/bunzip2 <text:s text:c="19"/>/bin/h2xs <text:s text:c="22"/>/bin/pydoc3.11 <text:s text:c="18"/>/bin/x86_64-linux-gnu-elfedit <text:s text:c="8"/>/bin/x86_64-linux-gnu-gprofng <text:s text:c="9"/>/sbin/e2undo</text:p>
      <text:p text:style-name="P3">/bin/bzip2 <text:s text:c="21"/>/bin/i386 <text:s text:c="22"/>/bin/pygettext3 <text:s text:c="17"/>/bin/x86_64-linux-gnu-gcc <text:s text:c="12"/>/bin/x86_64-linux-gnu-ld <text:s text:c="14"/>/sbin/e4crypt</text:p>
      <text:p text:style-name="P3">/bin/bzip2recover <text:s text:c="14"/>/bin/linux32 <text:s text:c="19"/>/bin/pygettext3.11 <text:s text:c="14"/>/bin/x86_64-linux-gnu-gcc-12 <text:s text:c="9"/>/bin/x86_64-linux-gnu-ld.bfd <text:s text:c="10"/>/sbin/e4defrag</text:p>
      <text:p text:style-name="P3">/bin/c89 <text:s text:c="23"/>/bin/linux64 <text:s text:c="19"/>/bin/python3 <text:s text:c="20"/>/bin/x86_64-linux-gnu-gcc-ar <text:s text:c="9"/>/bin/x86_64-linux-gnu-ld.gold <text:s text:c="9"/>/sbin/fsck.ext2</text:p>
      <text:p text:style-name="P3">/bin/c89-gcc <text:s text:c="19"/>/bin/lto-dump-12 <text:s text:c="15"/>/bin/python3.11 <text:s text:c="17"/>/bin/x86_64-linux-gnu-gcc-ar-12 <text:s text:c="6"/>/bin/x86_64-linux-gnu-lto-dump <text:s text:c="8"/>/sbin/fsck.ext3</text:p>
      <text:p text:style-name="P3">/bin/c99 <text:s text:c="23"/>/bin/md5sum <text:s text:c="20"/>/bin/sha1sum <text:s text:c="20"/>/bin/x86_64-linux-gnu-gcc-nm <text:s text:c="9"/>/bin/x86_64-linux-gnu-lto-dump-12 <text:s text:c="5"/>/sbin/fsck.ext4</text:p>
      <text:p text:style-name="P3">/bin/c99-gcc <text:s text:c="19"/>/bin/md5sum.textutils <text:s text:c="10"/>/bin/sha224sum <text:s text:c="18"/>/bin/x86_64-linux-gnu-gcc-nm-12 <text:s text:c="6"/>/bin/x86_64-linux-gnu-nm <text:s text:c="14"/>/sbin/killall5</text:p>
      <text:p text:style-name="P3">/bin/cpan5.36-x86_64-linux-gnu <text:s/>/bin/pdb3 <text:s text:c="22"/>/bin/sha256sum <text:s text:c="18"/>/bin/x86_64-linux-gnu-gcc-ranlib <text:s text:c="5"/>/bin/x86_64-linux-gnu-objcopy <text:s text:c="9"/>/sbin/mke2fs</text:p>
      <text:p text:style-name="P3">/bin/cpp-12 <text:s text:c="20"/>/bin/pdb3.11 <text:s text:c="19"/>/bin/sha384sum <text:s text:c="18"/>/bin/x86_64-linux-gnu-gcc-ranlib-12 <text:s text:c="2"/>/bin/x86_64-linux-gnu-objdump <text:s text:c="9"/>/sbin/mkfs.ext2</text:p>
      <text:p text:style-name="P3">/bin/diff3 <text:s text:c="21"/>/bin/perl5.36.0 <text:s text:c="16"/>/bin/sha512sum <text:s text:c="18"/>/bin/x86_64-linux-gnu-gcov <text:s text:c="11"/>/bin/x86_64-linux-gnu-ranlib <text:s text:c="10"/>/sbin/mkfs.ext3</text:p>
      <text:p text:style-name="P3">/bin/enc2xs <text:s text:c="20"/>/bin/perl5.36-x86_64-linux-gnu <text:s/>/bin/ssh-argv0 <text:s text:c="18"/>/bin/x86_64-linux-gnu-gcov-12 <text:s text:c="8"/>/bin/x86_64-linux-gnu-readelf <text:s text:c="9"/>/sbin/mkfs.ext4</text:p>
      <text:p text:style-name="P3"><text:soft-page-break/>/bin/gcc-12 <text:s text:c="20"/>/bin/ping4 <text:s text:c="21"/>/bin/systemd-id128 <text:s text:c="14"/>/bin/x86_64-linux-gnu-gcov-dump <text:s text:c="6"/>/bin/x86_64-linux-gnu-size <text:s text:c="12"/>/sbin/resize2fs</text:p>
      <text:p text:style-name="P3">/bin/gcc-ar-12 <text:s text:c="17"/>/bin/ping6 <text:s text:c="21"/>/bin/traceroute6 <text:s text:c="16"/>/bin/x86_64-linux-gnu-gcov-dump-12 <text:s text:c="3"/>/bin/x86_64-linux-gnu-strings <text:s text:c="9"/>/sbin/tune2fs</text:p>
      <text:p text:style-name="P3">/bin/gcc-nm-12 <text:s text:c="17"/>/bin/pl2pm <text:s text:c="21"/>/bin/traceroute6.db <text:s text:c="13"/>/bin/x86_64-linux-gnu-gcov-tool <text:s text:c="6"/>/bin/x86_64-linux-gnu-strip <text:s text:c="11"/>/sbin/update-grub2</text:p>
      <text:p text:style-name="P3">/bin/gcc-ranlib-12 <text:s text:c="13"/>/bin/pod2html <text:s text:c="18"/>/bin/x86_64 <text:s text:c="21"/>/bin/x86_64-linux-gnu-gcov-tool-12 <text:s text:c="3"/>/sbin/dumpe2fs</text:p>
      <text:p text:style-name="P3">/bin/gcov-12 <text:s text:c="19"/>/bin/pod2man <text:s text:c="19"/>/bin/x86_64-linux-gnu-addr2line <text:s/>/bin/x86_64-linux-gnu-gold <text:s text:c="11"/>/sbin/e2freefrag</text:p>
      <text:p text:style-name="P3">/bin/gcov-dump-12 <text:s text:c="14"/>/bin/pod2text <text:s text:c="18"/>/bin/x86_64-linux-gnu-ar <text:s text:c="8"/>/bin/x86_64-linux-gnu-gp-archive <text:s text:c="5"/>/sbin/e2fsck</text:p>
      <text:p text:style-name="P3">/bin/gcov-tool-12 <text:s text:c="14"/>/bin/pod2usage <text:s text:c="17"/>/bin/x86_64-linux-gnu-as <text:s text:c="8"/>/bin/x86_64-linux-gnu-gp-collect-app <text:s/>/sbin/e2image</text:p>
      <text:p text:style-name="P3"/>
      <text:p text:style-name="P4">14)</text:p>
      <text:p text:style-name="P4"><draw:frame draw:style-name="fr1" draw:name="Image10" text:anchor-type="char" svg:width="6.6929in" svg:height="0.5193in" draw:z-index="9"><draw:image xlink:href="Pictures/10000001000002AA00000035DBF45DE4661012EE.png" xlink:type="simple" xlink:show="embed" xlink:actuate="onLoad" draw:mime-type="image/png"/></draw:frame></text:p>
      <text:p text:style-name="P4">eltex-v44@eltex-2026-summer:eltex-2026-summer:\M&gt; export PS1='\u@\h-\A&gt; '</text:p>
      <text:p text:style-name="P4">eltex-v44@eltex-2026-summer-14:39&gt; </text:p>
      <text:p text:style-name="P4">15)</text:p>
      <text:p text:style-name="P4">Чтобы изменения в PS1 передались в новый запущенный bash (дочерний), нужно сделать переменную экспортируемой (я сделал её именно экспортируемой выше с export). Так как я уже сделал export PS1=..., то при запуске нового процесса bash оно должно сохраниться автоматически.</text:p>
      <text:p text:style-name="P4">16)</text:p>
      <text:p text:style-name="P4"><draw:frame draw:style-name="fr1" draw:name="Image11" text:anchor-type="char" svg:width="6.6929in" svg:height="0.6429in" draw:z-index="10"><draw:image xlink:href="Pictures/10000001000003D20000005E81138C8B4751E23E.png" xlink:type="simple" xlink:show="embed" xlink:actuate="onLoad" draw:mime-type="image/png"/></draw:frame>eltex-v44@eltex-2026-summer-14:39&gt; mkdir $(date +%Y)-{01..12}</text:p>
      <text:p text:style-name="P4">eltex-v44@eltex-2026-summer-14:43&gt; ls -d 2026-*</text:p>
      <text:p text:style-name="P4">2026-01 <text:s/>2026-02 <text:s/>2026-03 <text:s/>2026-04 <text:s/>2026-05 <text:s/>2026-06 <text:s/>2026-07 <text:s/>2026-08 <text:s/>2026-09 <text:s/>2026-10 <text:s/>2026-11 <text:s/>2026-12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6T14:13:45.375163686</meta:creation-date>
    <dc:date>2026-07-06T14:45:47.190959849</dc:date>
    <meta:editing-duration>PT1M25S</meta:editing-duration>
    <meta:editing-cycles>1</meta:editing-cycles>
    <meta:document-statistic meta:table-count="0" meta:image-count="11" meta:object-count="0" meta:page-count="8" meta:paragraph-count="112" meta:word-count="500" meta:character-count="7295" meta:non-whitespace-character-count="5296"/>
    <meta:generator>LibreOffice/7.3.7.2$Linux_X86_64 LibreOffice_project/30$Build-2</meta:generator>
  </office:meta>
</office:document-meta>
</file>