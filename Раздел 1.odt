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A600000040246B6146C8DBDBBA.png" manifest:media-type="image/png"/>
  <manifest:file-entry manifest:full-path="Pictures/10000001000001C20000007A5957F4900C56777B.png" manifest:media-type="image/png"/>
  <manifest:file-entry manifest:full-path="Pictures/10000001000000530000003825F30EAED69B4ACD.png" manifest:media-type="image/png"/>
  <manifest:file-entry manifest:full-path="Pictures/10000001000002A900000054B488171D64D76813.png" manifest:media-type="image/png"/>
  <manifest:file-entry manifest:full-path="Pictures/1000000100000142000000500852DFF71A8D1379.png" manifest:media-type="image/png"/>
  <manifest:file-entry manifest:full-path="Pictures/1000000100000378000000ED3761940D8E7F9282.png" manifest:media-type="image/png"/>
  <manifest:file-entry manifest:full-path="Pictures/10000001000002B50000008D738F8D597C68DA3D.png" manifest:media-type="image/png"/>
  <manifest:file-entry manifest:full-path="Pictures/10000001000001B40000004412298A943347D0F3.png" manifest:media-type="image/png"/>
  <manifest:file-entry manifest:full-path="Pictures/10000001000002B60000007513FE3EEE928824B8.png" manifest:media-type="image/png"/>
  <manifest:file-entry manifest:full-path="Pictures/10000001000002BE000000928C969F4AA78DBC78.png" manifest:media-type="image/png"/>
  <manifest:file-entry manifest:full-path="Pictures/100000010000073A0000041D9062B97959385300.png" manifest:media-type="image/png"/>
  <manifest:file-entry manifest:full-path="Pictures/10000001000002880000003FC5B5F88E68D8AF3E.png" manifest:media-type="image/png"/>
  <manifest:file-entry manifest:full-path="Pictures/10000001000001B000000041BDB6422DB98BD56B.png" manifest:media-type="image/png"/>
  <manifest:file-entry manifest:full-path="Pictures/10000001000002EB0000006E6A939A0ECB65B9D3.png" manifest:media-type="image/png"/>
  <manifest:file-entry manifest:full-path="Pictures/100000010000073A0000041D64C19DA903E2F790.png" manifest:media-type="image/png"/>
  <manifest:file-entry manifest:full-path="Pictures/100000010000020300000038C676E92A068B5CA9.png" manifest:media-type="image/png"/>
  <manifest:file-entry manifest:full-path="Pictures/100000010000012B00000032AE8C1A1950DF6686.png" manifest:media-type="image/png"/>
  <manifest:file-entry manifest:full-path="Pictures/100000010000073A0000041D9752E5C7E7CF62D1.png" manifest:media-type="image/png"/>
  <manifest:file-entry manifest:full-path="Pictures/100000010000073A0000041D290F5AE73C8F84CD.png" manifest:media-type="image/png"/>
  <manifest:file-entry manifest:full-path="Pictures/10000001000000FF00000022280C36F92F8A5E4E.png" manifest:media-type="image/png"/>
  <manifest:file-entry manifest:full-path="Pictures/100000010000073A0000041DA4E786253A946A6C.png" manifest:media-type="image/png"/>
  <manifest:file-entry manifest:full-path="Pictures/100000010000073A0000041DC073C9B94BD477A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style="italic" officeooo:rsid="0008321e" officeooo:paragraph-rsid="0008321e" style:font-size-asian="12.25pt" style:font-style-asian="italic" style:font-size-complex="14pt" style:font-style-complex="italic"/>
    </style:style>
    <style:style style:name="P2" style:family="paragraph" style:parent-style-name="Standard">
      <style:paragraph-properties fo:text-align="justify" style:justify-single-word="false"/>
      <style:text-properties fo:font-size="14pt" fo:font-style="italic" officeooo:rsid="0008321e" officeooo:paragraph-rsid="00090242" style:font-size-asian="12.25pt" style:font-style-asian="italic" style:font-size-complex="14pt" style:font-style-complex="italic"/>
    </style:style>
    <style:style style:name="P3" style:family="paragraph" style:parent-style-name="Standard" style:list-style-name="L2">
      <style:paragraph-properties fo:text-align="justify" style:justify-single-word="false"/>
      <style:text-properties fo:font-size="14pt" fo:font-style="italic" officeooo:rsid="0008321e" officeooo:paragraph-rsid="00090242" style:font-size-asian="12.25pt" style:font-style-asian="italic" style:font-size-complex="14pt" style:font-style-complex="italic"/>
    </style:style>
    <style:style style:name="P4" style:family="paragraph" style:parent-style-name="Standard">
      <style:paragraph-properties fo:text-align="justify" style:justify-single-word="false"/>
      <style:text-properties fo:font-size="14pt" fo:font-style="italic" officeooo:rsid="000aad9c" officeooo:paragraph-rsid="000aad9c" style:font-size-asian="12.25pt" style:font-style-asian="italic" style:font-size-complex="14pt" style:font-style-complex="italic"/>
    </style:style>
    <style:style style:name="P5" style:family="paragraph" style:parent-style-name="Standard">
      <style:paragraph-properties fo:text-align="center" style:justify-single-word="false"/>
      <style:text-properties fo:font-size="14pt" fo:font-style="italic" officeooo:rsid="000aad9c" officeooo:paragraph-rsid="000aad9c" style:font-size-asian="12.25pt" style:font-style-asian="italic" style:font-size-complex="14pt" style:font-style-complex="italic"/>
    </style:style>
    <style:style style:name="P6" style:family="paragraph" style:parent-style-name="Standard">
      <style:paragraph-properties fo:text-align="justify" style:justify-single-word="false"/>
      <style:text-properties fo:font-size="14pt" fo:font-style="italic" officeooo:rsid="000cea20" officeooo:paragraph-rsid="000cea20" style:font-size-asian="12.25pt" style:font-style-asian="italic" style:font-size-complex="14pt" style:font-style-complex="italic"/>
    </style:style>
    <style:style style:name="P7" style:family="paragraph" style:parent-style-name="Standard">
      <style:paragraph-properties fo:text-align="justify" style:justify-single-word="false"/>
      <style:text-properties fo:font-size="14pt" fo:font-style="italic" officeooo:rsid="000cea20" officeooo:paragraph-rsid="000d0d60" style:font-size-asian="12.25pt" style:font-style-asian="italic" style:font-size-complex="14pt" style:font-style-complex="italic"/>
    </style:style>
    <style:style style:name="P8" style:family="paragraph" style:parent-style-name="Standard">
      <style:paragraph-properties fo:text-align="justify" style:justify-single-word="false"/>
      <style:text-properties fo:font-size="14pt" fo:font-style="italic" officeooo:rsid="000d0d60" officeooo:paragraph-rsid="000d0d60" style:font-size-asian="12.25pt" style:font-style-asian="italic" style:font-size-complex="14pt" style:font-style-complex="italic"/>
    </style:style>
    <style:style style:name="P9" style:family="paragraph" style:parent-style-name="Standard">
      <style:paragraph-properties fo:text-align="center" style:justify-single-word="false"/>
      <style:text-properties fo:font-size="14pt" fo:font-style="italic" officeooo:rsid="000d0d60" officeooo:paragraph-rsid="000d0d60" style:font-size-asian="12.25pt" style:font-style-asian="italic" style:font-size-complex="14pt" style:font-style-complex="italic"/>
    </style:style>
    <style:style style:name="T1" style:family="text">
      <style:text-properties officeooo:rsid="00090242"/>
    </style:style>
    <style:style style:name="T2" style:family="text">
      <style:text-properties officeooo:rsid="000aad9c"/>
    </style:style>
    <style:style style:name="T3" style:family="text">
      <style:text-properties officeooo:rsid="000aea62"/>
    </style:style>
    <style:style style:name="T4" style:family="text">
      <style:text-properties officeooo:rsid="000cea20"/>
    </style:style>
    <style:style style:name="T5" style:family="text">
      <style:text-properties officeooo:rsid="000d0d60"/>
    </style:style>
    <style:style style:name="T6" style:family="text">
      <style:text-properties officeooo:rsid="000e022a"/>
    </style:style>
    <style:style style:name="T7" style:family="text">
      <style:text-properties officeooo:rsid="000f007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Раздел </text:span>1 <text:span text:style-name="T4">Утилита</text:span><text:span text:style-name="T2"> Screen</text:span></text:p>
      <text:list xml:id="list4076532338" text:style-name="L2">
        <text:list-item>
          <text:p text:style-name="P3"><text:span text:style-name="T1">C</text:span>оздать сессию: screen (просто нажми Enter). </text:p>
        </text:list-item>
        <text:list-item>
          <text:p text:style-name="P3">Посмотреть список пользователей: w </text:p>
          <text:p text:style-name="P3"><draw:frame draw:style-name="fr3" draw:name="Image1" text:anchor-type="char" svg:width="6.4429in" svg:height="3.6665in" draw:z-index="0"><draw:image xlink:href="Pictures/100000010000073A0000041D64C19DA903E2F790.png" xlink:type="simple" xlink:show="embed" xlink:actuate="onLoad" draw:mime-type="image/png"/></draw:frame></text:p>
        </text:list-item>
        <text:list-item>
          <text:p text:style-name="P3">Отключиться: нажми Ctrl + a, затем d. </text:p>
        </text:list-item>
      </text:list>
      <text:p text:style-name="P2"><draw:frame draw:style-name="fr1" draw:name="Image2" text:anchor-type="as-char" svg:width="4.5417in" svg:height="0.7083in" draw:z-index="1"><draw:image xlink:href="Pictures/10000001000001B40000004412298A943347D0F3.png" xlink:type="simple" xlink:show="embed" xlink:actuate="onLoad" draw:mime-type="image/png"/></draw:frame></text:p>
      <text:p text:style-name="P2"/>
      <text:list xml:id="list141233215422023" text:continue-numbering="true" text:style-name="L2">
        <text:list-item>
          <text:p text:style-name="P3">Создать именованную сессию с top: screen -S top -d -m top </text:p>
          <text:p text:style-name="P3"><draw:frame draw:style-name="fr1" draw:name="Image3" text:anchor-type="as-char" svg:width="5.3646in" svg:height="0.5835in" draw:z-index="2"><draw:image xlink:href="Pictures/100000010000020300000038C676E92A068B5CA9.png" xlink:type="simple" xlink:show="embed" xlink:actuate="onLoad" draw:mime-type="image/png"/></draw:frame></text:p>
        </text:list-item>
        <text:list-item>
          <text:p text:style-name="P3">Получить список сессий: screen -ls </text:p>
          <text:p text:style-name="P3"><draw:frame draw:style-name="fr3" draw:name="Image4" text:anchor-type="char" svg:width="6.4429in" svg:height="1.0862in" draw:z-index="3"><draw:image xlink:href="Pictures/10000001000002B60000007513FE3EEE928824B8.png" xlink:type="simple" xlink:show="embed" xlink:actuate="onLoad" draw:mime-type="image/png"/></draw:frame></text:p>
        </text:list-item>
        <text:list-item>
          <text:p text:style-name="P3">Подключиться к ней: screen -r top </text:p>
          <text:p text:style-name="P3"><draw:frame draw:style-name="fr5" draw:name="Image5" text:anchor-type="char" svg:width="6.4429in" svg:height="3.6665in" draw:z-index="4"><draw:image xlink:href="Pictures/100000010000073A0000041D9062B97959385300.png" xlink:type="simple" xlink:show="embed" xlink:actuate="onLoad" draw:mime-type="image/png"/></draw:frame><text:soft-page-break/></text:p>
        </text:list-item>
        <text:list-item>
          <text:p text:style-name="P3">Создать окно внутри сессии: Ctrl + a, затем c. </text:p>
          <text:p text:style-name="P3"/>
        </text:list-item>
        <text:list-item>
          <text:p text:style-name="P3">Запустить команду: watch /usr/bin/vmstat </text:p>
          <text:p text:style-name="P3"><draw:frame draw:style-name="fr3" draw:name="Image6" text:anchor-type="char" svg:width="6.4429in" svg:height="0.9484in" draw:z-index="5"><draw:image xlink:href="Pictures/10000001000002EB0000006E6A939A0ECB65B9D3.png" xlink:type="simple" xlink:show="embed" xlink:actuate="onLoad" draw:mime-type="image/png"/></draw:frame></text:p>
        </text:list-item>
        <text:list-item>
          <text:p text:style-name="P3">Переименовать окно: Ctrl + a, затем A (напиши vmstat и нажми Enter).</text:p>
          <text:p text:style-name="P3"><draw:frame draw:style-name="fr1" draw:name="Image7" text:anchor-type="as-char" svg:width="3.1146in" svg:height="0.5209in" draw:z-index="6"><draw:image xlink:href="Pictures/100000010000012B00000032AE8C1A1950DF6686.png" xlink:type="simple" xlink:show="embed" xlink:actuate="onLoad" draw:mime-type="image/png"/></draw:frame></text:p>
        </text:list-item>
        <text:list-item>
          <text:p text:style-name="P3">Переключиться: Ctrl + a, затем n (next) или p (previous)</text:p>
        </text:list-item>
      </text:list>
      <text:p text:style-name="P2"/>
      <text:p text:style-name="P4"><text:span text:style-name="T4">Переключается</text:span><text:line-break/></text:p>
      <text:p text:style-name="P6"><draw:frame draw:style-name="fr2" draw:name="Image8" text:anchor-type="char" svg:width="6.6929in" svg:height="3.8091in" draw:z-index="7"><draw:image xlink:href="Pictures/100000010000073A0000041D9752E5C7E7CF62D1.png" xlink:type="simple" xlink:show="embed" xlink:actuate="onLoad" draw:mime-type="image/png"/></draw:frame><draw:frame draw:style-name="fr2" draw:name="Image9" text:anchor-type="char" svg:width="6.6929in" svg:height="3.8091in" draw:z-index="8"><draw:image xlink:href="Pictures/100000010000073A0000041DA4E786253A946A6C.png" xlink:type="simple" xlink:show="embed" xlink:actuate="onLoad" draw:mime-type="image/png"/></draw:frame><text:soft-page-break/>Переключается</text:p>
      <text:p text:style-name="P4"/>
      <text:p text:style-name="P4"/>
      <text:p text:style-name="P4"><draw:frame draw:style-name="fr4" draw:name="Image10" text:anchor-type="char" svg:width="6.6929in" svg:height="3.8091in" draw:z-index="9"><draw:image xlink:href="Pictures/100000010000073A0000041D290F5AE73C8F84CD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<text:s/><text:span text:style-name="T4">ещё</text:span> 4 пункта (11–14).</text:p>
      <text:p text:style-name="P5"/>
      <text:p text:style-name="P5"/>
      <text:p text:style-name="P5"/>
      <text:p text:style-name="P4">11. Перейдите в окно, в котором работает `top`</text:p>
      <text:p text:style-name="P4"/>
      <text:p text:style-name="P4">Команда: Ctrl+a`, а затем `0` (ноль).</text:p>
      <text:p text:style-name="P4">Почему так: Обычно первое открытое окно в `screen` имеет индекс `0`. </text:p>
      <text:p text:style-name="P4"><draw:frame draw:style-name="fr2" draw:name="Image11" text:anchor-type="char" svg:width="6.6929in" svg:height="3.8091in" draw:z-index="10"><draw:image xlink:href="Pictures/100000010000073A0000041DC073C9B94BD477A6.png" xlink:type="simple" xlink:show="embed" xlink:actuate="onLoad" draw:mime-type="image/png"/></draw:frame></text:p>
      <text:p text:style-name="P5"/>
      <text:p text:style-name="P4">12. Отсоединитесь от сессии `top`</text:p>
      <text:p text:style-name="P4">нужно выйти из самой сессии, при этом оставив её работать в фоновом режиме.</text:p>
      <text:p text:style-name="P4">Команда: `Ctrl+a`, а затем `d` (detach).</text:p>
      <text:p text:style-name="P4"><text:s text:c="2"/>После этого <text:span text:style-name="T3">мы вернуись</text:span> в обычную командную строку терминала, а сессия `top` продолжит работать "в фоне".</text:p>
      <text:p text:style-name="P4"><draw:frame draw:style-name="fr1" draw:name="Image12" text:anchor-type="as-char" svg:width="4.5in" svg:height="0.6772in" draw:z-index="11"><draw:image xlink:href="Pictures/10000001000001B000000041BDB6422DB98BD56B.png" xlink:type="simple" xlink:show="embed" xlink:actuate="onLoad" draw:mime-type="image/png"/></draw:frame></text:p>
      <text:p text:style-name="P5"/>
      <text:p text:style-name="P4">### 13. Запустите новую сессию и запустите в окне команду `vi report_part1.txt`</text:p>
      <text:p text:style-name="P4"/>
      <text:p text:style-name="P4">Команда:`screen -S report -m vi report_part1.txt`</text:p>
      <text:p text:style-name="P4">Разбор команды:</text:p>
      <text:p text:style-name="P4"><text:s/>`-S report` — задает имя сессии (чтобы потом было легче управлять).</text:p>
      <text:p text:style-name="P4"><text:s text:c="3"/>`-m` — заставляет `screen` создать новую сессию, даже если ты уже внутри другой.</text:p>
      <text:p text:style-name="P4"><text:soft-page-break/>`vi report_part1.txt` — команда, которая сразу запустится в этой сессии.</text:p>
      <text:p text:style-name="P4"><draw:frame draw:style-name="fr3" draw:name="Image13" text:anchor-type="char" svg:width="2.6563in" svg:height="0.3543in" draw:z-index="12"><draw:image xlink:href="Pictures/10000001000000FF00000022280C36F92F8A5E4E.png" xlink:type="simple" xlink:show="embed" xlink:actuate="onLoad" draw:mime-type="image/png"/></draw:frame></text:p>
      <text:p text:style-name="P5"/>
      <text:p text:style-name="P4">14. Отсоединитесь от сессии и получите список сессий</text:p>
      <text:p text:style-name="P4">Когда `vi` откроется, выйти из него в "фоновый режим", чтобы увидеть список.</text:p>
      <text:p text:style-name="P4">1. <text:s/>Вы<text:span text:style-name="T4">ход</text:span> из `vi` в фоновый режим: <text:s/>`Ctrl+a`, а затем `d`.</text:p>
      <text:p text:style-name="P4"><draw:frame draw:style-name="fr2" draw:name="Image14" text:anchor-type="char" svg:width="6.6929in" svg:height="0.6508in" draw:z-index="13"><draw:image xlink:href="Pictures/10000001000002880000003FC5B5F88E68D8AF3E.png" xlink:type="simple" xlink:show="embed" xlink:actuate="onLoad" draw:mime-type="image/png"/></draw:frame></text:p>
      <text:p text:style-name="P4">2. <text:s/>**Получи список сессий:** в терминале выполни команду:</text:p>
      <text:p text:style-name="P4"><text:s text:c="4"/>```bash</text:p>
      <text:p text:style-name="P4"><text:s text:c="4"/>screen -ls</text:p>
      <text:p text:style-name="P4"><text:s text:c="4"/>```</text:p>
      <text:p text:style-name="P6"><draw:frame draw:style-name="fr2" draw:name="Image15" text:anchor-type="char" svg:width="6.6929in" svg:height="1.361in" draw:z-index="14"><draw:image xlink:href="Pictures/10000001000002B50000008D738F8D597C68DA3D.png" xlink:type="simple" xlink:show="embed" xlink:actuate="onLoad" draw:mime-type="image/png"/></draw:frame></text:p>
      <text:p text:style-name="P6"/>
      <text:p text:style-name="P9">Оставшиеся пункты 1-го раздела (15-18)</text:p>
      <text:p text:style-name="P6">Пункт 15. Отключение от сервера</text:p>
      <text:p text:style-name="P6"/>
      <text:p text:style-name="P6">Чтобы корректно отключиться от удаленного сервера, <text:span text:style-name="T5">нужно </text:span>просто вве<text:span text:style-name="T5">ст</text:span>и команду `exit` или наж<text:span text:style-name="T5">ать</text:span> сочетание клавиш `Ctrl + d`. Это завершит SSH-сессию, и <text:span text:style-name="T5">я</text:span> верн<text:span text:style-name="T5">усь</text:span> в терминал своего локального компьютера.</text:p>
      <text:p text:style-name="P6"/>
      <text:p text:style-name="P6"><draw:frame draw:style-name="fr1" draw:name="Image16" text:anchor-type="as-char" svg:width="3.3543in" svg:height="0.8335in" draw:z-index="15"><draw:image xlink:href="Pictures/1000000100000142000000500852DFF71A8D1379.png" xlink:type="simple" xlink:show="embed" xlink:actuate="onLoad" draw:mime-type="image/png"/></draw:frame></text:p>
      <text:p text:style-name="P6"/>
      <text:p text:style-name="P6">Пункт 16. Подключение и получение списка сессий</text:p>
      <text:p text:style-name="P7">Сначала снова подключи<text:span text:style-name="T5">лся</text:span> к серверу по SSH, как <text:span text:style-name="T5">я это</text:span> делал в самом начале.</text:p>
      <text:p text:style-name="P7">ssh eltex-v44@217.71.138.1 -p 44556</text:p>
      <text:p text:style-name="P8">пароль: 177AUKv6JqRN0</text:p>
      <text:p text:style-name="P6"><draw:frame draw:style-name="fr2" draw:name="Image17" text:anchor-type="char" svg:width="6.6929in" svg:height="1.7862in" draw:z-index="16"><draw:image xlink:href="Pictures/1000000100000378000000ED3761940D8E7F9282.png" xlink:type="simple" xlink:show="embed" xlink:actuate="onLoad" draw:mime-type="image/png"/></draw:frame><text:soft-page-break/></text:p>
      <text:p text:style-name="P6"><text:s/>После этого провер<text:span text:style-name="T5">ил</text:span>, какие сессии `screen` остались активны (так как мы отсоединялись, они должны быть в списке):</text:p>
      <text:p text:style-name="P6"/>
      <text:p text:style-name="P6"/>
      <text:p text:style-name="P6">screen -ls</text:p>
      <text:p text:style-name="P6"/>
      <text:p text:style-name="P6"/>
      <text:p text:style-name="P6">список, где указаны <text:span text:style-name="T5">м</text:span>ои сессии (например, `top` и `report`).</text:p>
      <text:p text:style-name="P6"/>
      <text:p text:style-name="P6"><draw:frame draw:style-name="fr2" draw:name="Image18" text:anchor-type="char" svg:width="6.6929in" svg:height="1.3917in" draw:z-index="17"><draw:image xlink:href="Pictures/10000001000002BE000000928C969F4AA78DBC78.png" xlink:type="simple" xlink:show="embed" xlink:actuate="onLoad" draw:mime-type="image/png"/></draw:frame></text:p>
      <text:p text:style-name="P6"/>
      <text:p text:style-name="P6">### Пункт 17. Работа с редактором `vi`</text:p>
      <text:p text:style-name="P6"/>
      <text:p text:style-name="P6">Теперь подключи<text:span text:style-name="T6">лся</text:span> к своей сессии с отчетом:</text:p>
      <text:p text:style-name="P6"/>
      <text:p text:style-name="P6"/>
      <text:p text:style-name="P6">screen -r report</text:p>
      <text:p text:style-name="P6"/>
      <text:p text:style-name="P6"><draw:frame draw:style-name="fr2" draw:name="Image19" text:anchor-type="char" svg:width="6.6929in" svg:height="0.8252in" draw:z-index="18"><draw:image xlink:href="Pictures/10000001000002A900000054B488171D64D76813.png" xlink:type="simple" xlink:show="embed" xlink:actuate="onLoad" draw:mime-type="image/png"/></draw:frame></text:p>
      <text:p text:style-name="P6">Ты окажешься внутри `vi` с открытым файлом `report_part1.txt`. Вот как сделать запись в файл, если ты новичок в `vi`:</text:p>
      <text:p text:style-name="P6"/>
      <text:p text:style-name="P6">1. <text:s/>Как только ты попал внутрь, нажми клавишу **`i`** на клавиатуре. Ты перейдешь в режим вставки текста (внизу слева может появиться надпись `-- INSERT --`).</text:p>
      <text:p text:style-name="P6">2. <text:s/>Напиши нужную фразу: </text:p>
      <text:p text:style-name="P6"><text:soft-page-break/><text:s text:c="4"/>`Илья, часть 1 модуля 1 успешно завершена 06.07.2026`</text:p>
      <text:p text:style-name="P6">3. <text:s/>Нажми клавишу **`Esc`**, чтобы выйти из режима вставки текста.</text:p>
      <text:p text:style-name="P6"/>
      <text:p text:style-name="P6"/>
      <text:p text:style-name="P6">Пункт 18. Сохранение файла и закрытие сессий</text:p>
      <text:p text:style-name="P6"/>
      <text:p text:style-name="P6">Теперь, когда <text:span text:style-name="T7">я</text:span> нахо<text:span text:style-name="T7">жусь</text:span> в режиме команд (после нажатия `Esc`), нужно сохранить файл и выйти:</text:p>
      <text:p text:style-name="P6"/>
      <text:p text:style-name="P6">1. <text:s/>Вве<text:span text:style-name="T7">л</text:span> последовательность символов: **`:wq`** (это значит *write* и *quit*), затем наж<text:span text:style-name="T7">ал</text:span> **`Enter`**. <text:span text:style-name="T7">В</text:span>ы<text:span text:style-name="T7">шел</text:span> из редактора `vi` в командную строку сессии `screen`.</text:p>
      <text:p text:style-name="P6"><draw:frame draw:style-name="fr1" draw:name="Image20" text:anchor-type="as-char" svg:width="0.8646in" svg:height="0.5835in" draw:z-index="19"><draw:image xlink:href="Pictures/10000001000000530000003825F30EAED69B4ACD.png" xlink:type="simple" xlink:show="embed" xlink:actuate="onLoad" draw:mime-type="image/png"/></draw:frame></text:p>
      <text:p text:style-name="P6">2. <text:s/>Чтобы завершить работу с этой сессией, вве<text:span text:style-name="T7">л</text:span> **`exit`**. Сессия `report` закроется.</text:p>
      <text:p text:style-name="P6"><draw:frame draw:style-name="fr1" draw:name="Image21" text:anchor-type="as-char" svg:width="4.6874in" svg:height="1.2709in" draw:z-index="20"><draw:image xlink:href="Pictures/10000001000001C20000007A5957F4900C56777B.png" xlink:type="simple" xlink:show="embed" xlink:actuate="onLoad" draw:mime-type="image/png"/></draw:frame></text:p>
      <text:p text:style-name="P6">3. <text:s/>Чтобы закрыть остальные сессии (например, `top`), подсоедини<text:span text:style-name="T7">лся</text:span> к ним (`screen -r top`) и точно так же вв<text:span text:style-name="T7">одил</text:span> `exit` внутри каждой из них.</text:p>
      <text:p text:style-name="P6"/>
      <text:p text:style-name="P6">После того как <text:span text:style-name="T7">я</text:span> закр<text:span text:style-name="T7">ыл</text:span> их все, команда `screen -ls` выда<text:span text:style-name="T7">ла</text:span> сообщение о том, что активных сессий нет (*No Sockets found*).</text:p>
      <text:p text:style-name="P6"><draw:frame draw:style-name="fr1" draw:name="Image22" text:anchor-type="as-char" svg:width="4.3957in" svg:height="0.6665in" draw:z-index="21"><draw:image xlink:href="Pictures/10000001000001A600000040246B6146C8DBDBBA.png" xlink:type="simple" xlink:show="embed" xlink:actuate="onLoad" draw:mime-type="image/png"/></draw:frame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06T12:45:04.879608608</meta:creation-date>
    <dc:date>2026-07-06T14:12:31.841357113</dc:date>
    <meta:editing-duration>PT5M43S</meta:editing-duration>
    <meta:editing-cycles>1</meta:editing-cycles>
    <meta:document-statistic meta:table-count="0" meta:image-count="22" meta:object-count="0" meta:page-count="7" meta:paragraph-count="66" meta:word-count="609" meta:character-count="3915" meta:non-whitespace-character-count="3332"/>
    <meta:generator>LibreOffice/7.3.7.2$Linux_X86_64 LibreOffice_project/30$Build-2</meta:generator>
  </office:meta>
</office:document-meta>
</file>