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C000001456268516084058EB9.png" manifest:media-type="image/png"/>
  <manifest:file-entry manifest:full-path="Pictures/100000010000048C0000006BA848F9D9F153DF1F.png" manifest:media-type="image/png"/>
  <manifest:file-entry manifest:full-path="Pictures/1000000100000315000000B6FCA43C2639E00649.png" manifest:media-type="image/png"/>
  <manifest:file-entry manifest:full-path="Pictures/10000001000003B5000001682AD9D26E388C1242.png" manifest:media-type="image/png"/>
  <manifest:file-entry manifest:full-path="Pictures/10000001000002F10000006D76D4A585731B06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682b1" officeooo:paragraph-rsid="000682b1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682b1" officeooo:paragraph-rsid="000682b1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875d9" officeooo:paragraph-rsid="000875d9" style:font-size-asian="12.25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аздел 3</text:p>
      <text:p text:style-name="P2">Пункты (1-2)</text:p>
      <text:p text:style-name="P2"><draw:frame draw:style-name="fr1" draw:name="Image1" text:anchor-type="char" svg:width="6.6929in" svg:height="0.9689in" draw:z-index="0"><draw:image xlink:href="Pictures/10000001000002F10000006D76D4A585731B066F.png" xlink:type="simple" xlink:show="embed" xlink:actuate="onLoad" draw:mime-type="image/png"/></draw:frame>eltex-v44@eltex-2026-summer-14:44&gt; cd ~</text:p>
      <text:p text:style-name="P2">touch ${USER}_part3.log</text:p>
      <text:p text:style-name="P2">eltex-v44@eltex-2026-summer-14:50&gt; echo "mkdir -p D1/D2/D3" &gt;&gt; ${USER}_part3.log</text:p>
      <text:p text:style-name="P2">mkdir -p D1/D2/D3</text:p>
      <text:p text:style-name="P2">eltex-v44@eltex-2026-summer-14:51&gt; </text:p>
      <text:p text:style-name="P2"/>
      <text:p text:style-name="P2">Пункты (3-6)</text:p>
      <text:p text:style-name="P2"/>
      <text:p text:style-name="P2">Создание файла</text:p>
      <text:p text:style-name="P2"/>
      <text:p text:style-name="P2">echo "touch D1/D2/file.txt" &gt;&gt; ${USER}_part3.log</text:p>
      <text:p text:style-name="P2">touch D1/D2/file.txt</text:p>
      <text:p text:style-name="P2"/>
      <text:p text:style-name="P2">Запись текста</text:p>
      <text:p text:style-name="P2"><text:line-break/>echo "echo 'Some text' &gt; D1/D2/file.txt" &gt;&gt; ${USER}_part3.log</text:p>
      <text:p text:style-name="P2">echo "Some text" &gt; D1/D2/file.txt</text:p>
      <text:p text:style-name="P2"/>
      <text:p text:style-name="P2">Создание ссылок</text:p>
      <text:p text:style-name="P2"/>
      <text:p text:style-name="P2"><text:tab/>жёсткая ссылка (ln)</text:p>
      <text:p text:style-name="P2">echo "ln D1/D2/file.txt D1/D2/D3/hard_link" &gt;&gt; ${USER}_part3.log</text:p>
      <text:p text:style-name="P2">ln D1/D2/file.txt D1/D2/D3/hard_link</text:p>
      <text:p text:style-name="P2"/>
      <text:p text:style-name="P2"><text:tab/>Символическиая ссылка (ln -s)</text:p>
      <text:p text:style-name="P2">echo "ln -s D1/D2/file.txt D1/D2/D3/soft_link" &gt;&gt; ${USER}_part3.log</text:p>
      <text:p text:style-name="P2">ln -s D1/D2/file.txt D1/D2/D3/soft_link</text:p>
      <text:p text:style-name="P2"/>
      <text:p text:style-name="P3">Проверка</text:p>
      <text:p text:style-name="P3">ls -li D1/D2/D3</text:p>
      <text:p text:style-name="P3"/>
      <text:p text:style-name="P3"/>
      <text:p text:style-name="P3"/>
      <text:p text:style-name="P3"><draw:frame draw:style-name="fr2" draw:name="Image2" text:anchor-type="char" svg:width="6.6929in" svg:height="2.539in" draw:z-index="1"><draw:image xlink:href="Pictures/10000001000003B5000001682AD9D26E388C1242.png" xlink:type="simple" xlink:show="embed" xlink:actuate="onLoad" draw:mime-type="image/png"/></draw:frame><text:soft-page-break/>выфвыф</text:p>
      <text:p text:style-name="P3"/>
      <text:p text:style-name="P3"/>
      <text:p text:style-name="P3">Пункты (7-8)</text:p>
      <text:p text:style-name="P3">перемещаем файл</text:p>
      <text:p text:style-name="P3"/>
      <text:p text:style-name="P3">eltex-v44@eltex-2026-summer-14:56&gt; echo "mv D1/D2/file.txt D1/" &gt;&gt; ${USER}_part3.log</text:p>
      <text:p text:style-name="P3">mv D1/D2/file.txt D1/</text:p>
      <text:p text:style-name="P3"/>
      <text:p text:style-name="P3">Проверка работы ссылок </text:p>
      <text:p text:style-name="P3"/>
      <text:p text:style-name="P3">eltex-v44@eltex-2026-summer-14:58&gt; cat D1/D2/D3/hard_link <text:s/># Должно работать</text:p>
      <text:p text:style-name="P3">cat D1/D2/D3/soft_link <text:s/># Должно выдать ошибку (No such file or directory)</text:p>
      <text:p text:style-name="P3">Some text</text:p>
      <text:p text:style-name="P3">cat: D1/D2/D3/soft_link: No such file or directory</text:p>
      <text:p text:style-name="P3">eltex-v44@eltex-2026-summer-14:59&gt; cat D1/D2/D3/hard_link <text:s/># Должно работать</text:p>
      <text:p text:style-name="P3">Some text</text:p>
      <text:p text:style-name="P3">eltex-v44@eltex-2026-summer-14:59&gt; </text:p>
      <text:p text:style-name="P3"><draw:frame draw:style-name="fr1" draw:name="Image3" text:anchor-type="char" svg:width="6.6929in" svg:height="1.5437in" draw:z-index="2"><draw:image xlink:href="Pictures/1000000100000315000000B6FCA43C2639E00649.png" xlink:type="simple" xlink:show="embed" xlink:actuate="onLoad" draw:mime-type="image/png"/></draw:frame>Ответ на вопрос (почему так?):</text:p>
      <text:p text:style-name="P3"/>
      <text:p text:style-name="P3"/>
      <text:p text:style-name="P3">Жесткая ссылка — это по сути «второе имя» для того же места на диске (один инод). Ей неважно, где находится файл, она ссылается на данные напрямую.</text:p>
      <text:p text:style-name="P3"><text:soft-page-break/>Символическая ссылка — это просто «указатель на путь» (ярлык). Мы переместили файл, путь изменился, и ссылка «сломалась», потому что она продолжала искать файл по старому адресу D1/D2/file.txt.</text:p>
      <text:p text:style-name="P3"/>
      <text:p text:style-name="P3"/>
      <text:p text:style-name="P3">Удаление и поиск</text:p>
      <text:p text:style-name="P3">echo "rm -rf D1/D2" &gt;&gt; ${USER}_part3.log</text:p>
      <text:p text:style-name="P3">rm -rf D1/D2</text:p>
      <text:p text:style-name="P3"/>
      <text:p text:style-name="P3">для поиска файлов тяжелее 20 мб</text:p>
      <text:p text:style-name="P3">echo "find / -type f -size +20M 2&gt;/dev/null &gt; ${USER}_part3_gt20M.log" &gt;&gt; ${USER}_part3.log</text:p>
      <text:p text:style-name="P3">find / -type f -size +20M 2&gt;/dev/null &gt; ${USER}_part3_gt20M.log</text:p>
      <text:p text:style-name="P3"><draw:frame draw:style-name="fr1" draw:name="Image4" text:anchor-type="char" svg:width="6.6929in" svg:height="0.6146in" draw:z-index="3"><draw:image xlink:href="Pictures/100000010000048C0000006BA848F9D9F153DF1F.png" xlink:type="simple" xlink:show="embed" xlink:actuate="onLoad" draw:mime-type="image/png"/></draw:frame></text:p>
      <text:p text:style-name="P3"/>
      <text:p text:style-name="P3">Пункты (11-15)</text:p>
      <text:p text:style-name="P3"/>
      <text:p text:style-name="P3">Поиск файлов за 24 часа</text:p>
      <text:p text:style-name="P3">find ~ -type f -mtime -1</text:p>
      <text:p text:style-name="P3"/>
      <text:p text:style-name="P3">Где лежит find</text:p>
      <text:p text:style-name="P3">which find</text:p>
      <text:p text:style-name="P3"/>
      <text:p text:style-name="P3">Характер содержимого</text:p>
      <text:p text:style-name="P3">file /usr/bin/find </text:p>
      <text:p text:style-name="P3"/>
      <text:p text:style-name="P3">Тип файлов в /boot</text:p>
      <text:p text:style-name="P3">file /boot/initrd.img*</text:p>
      <text:p text:style-name="P3"/>
      <text:p text:style-name="P3"><draw:frame draw:style-name="fr1" draw:name="Image5" text:anchor-type="char" svg:width="6.6929in" svg:height="1.1744in" draw:z-index="4"><draw:image xlink:href="Pictures/100000010000073C000001456268516084058EB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6T14:45:52.835028506</meta:creation-date>
    <dc:date>2026-07-06T15:19:28.234999719</dc:date>
    <meta:editing-duration>PT11M52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3" meta:paragraph-count="54" meta:word-count="255" meta:character-count="1987" meta:non-whitespace-character-count="1774"/>
  </office:meta>
</office:document-meta>
</file>