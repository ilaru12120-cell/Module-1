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@eltex-practice2-v44:~# witch dmesg</text:p>
      <text:p text:style-name="Standard">Command 'witch' not found, did you mean:</text:p>
      <text:p text:style-name="Standard"><text:s text:c="2"/>command 'watch' from deb procps (2:4.0.4-4ubuntu3.2)</text:p>
      <text:p text:style-name="Standard"><text:s text:c="2"/>command 'hitch' from deb hitch (1.7.2-1)</text:p>
      <text:p text:style-name="Standard">Try: apt install &lt;deb name&gt;</text:p>
      <text:p text:style-name="Standard">root@eltex-practice2-v44:~# apt install dmesg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E: Unable to locate package dmesg</text:p>
      <text:p text:style-name="Standard">root@eltex-practice2-v44:~# sudo apt update</text:p>
      <text:p text:style-name="Standard">Hit:1 http://ru.archive.ubuntu.com/ubuntu noble InRelease</text:p>
      <text:p text:style-name="Standard">Get:2 http://ru.archive.ubuntu.com/ubuntu noble-updates InRelease [126 kB]</text:p>
      <text:p text:style-name="Standard">Get:3 http://ru.archive.ubuntu.com/ubuntu noble-backports InRelease [126 kB] <text:s text:c="10"/></text:p>
      <text:p text:style-name="Standard">Get:4 http://ru.archive.ubuntu.com/ubuntu noble-updates/main amd64 Packages [1079 kB]</text:p>
      <text:p text:style-name="Standard">Get:5 http://ru.archive.ubuntu.com/ubuntu noble-updates/main Translation-en [267 kB]</text:p>
      <text:p text:style-name="Standard">Get:6 http://ru.archive.ubuntu.com/ubuntu noble-updates/main amd64 Components [181 kB]</text:p>
      <text:p text:style-name="Standard">Get:7 http://ru.archive.ubuntu.com/ubuntu noble-updates/main amd64 c-n-f Metadata [17.7 kB]</text:p>
      <text:p text:style-name="Standard">Get:8 http://ru.archive.ubuntu.com/ubuntu noble-updates/restricted amd64 Packages [1196 kB]</text:p>
      <text:p text:style-name="Standard">Get:9 http://ru.archive.ubuntu.com/ubuntu noble-updates/restricted Translation-en [271 kB]</text:p>
      <text:p text:style-name="Standard">Get:10 http://security.ubuntu.com/ubuntu noble-security InRelease [126 kB]</text:p>
      <text:p text:style-name="Standard">Get:11 http://ru.archive.ubuntu.com/ubuntu noble-updates/restricted amd64 Components [212 B] <text:s text:c="4"/></text:p>
      <text:p text:style-name="Standard">Get:12 http://ru.archive.ubuntu.com/ubuntu noble-updates/restricted amd64 c-n-f Metadata [456 B] </text:p>
      <text:p text:style-name="Standard">Get:13 http://ru.archive.ubuntu.com/ubuntu noble-updates/universe amd64 Packages [1659 kB] <text:s text:c="6"/></text:p>
      <text:p text:style-name="Standard">Get:14 http://ru.archive.ubuntu.com/ubuntu noble-updates/universe Translation-en [327 kB] <text:s text:c="7"/></text:p>
      <text:p text:style-name="Standard">Get:15 http://ru.archive.ubuntu.com/ubuntu noble-updates/universe amd64 Components [388 kB] <text:s text:c="13"/></text:p>
      <text:p text:style-name="Standard">Get:16 http://ru.archive.ubuntu.com/ubuntu noble-updates/universe amd64 c-n-f Metadata [34.9 kB] <text:s text:c="3"/></text:p>
      <text:p text:style-name="Standard">Get:17 http://ru.archive.ubuntu.com/ubuntu noble-updates/multiverse amd64 Packages [40.4 kB] <text:s text:c="2"/></text:p>
      <text:p text:style-name="Standard">Get:18 http://ru.archive.ubuntu.com/ubuntu noble-updates/multiverse Translation-en [11.8 kB]</text:p>
      <text:p text:style-name="Standard">Get:19 http://ru.archive.ubuntu.com/ubuntu noble-updates/multiverse amd64 Components [940 B] <text:s text:c="2"/></text:p>
      <text:p text:style-name="Standard">Get:20 http://ru.archive.ubuntu.com/ubuntu noble-updates/multiverse amd64 c-n-f Metadata [656 B]</text:p>
      <text:p text:style-name="Standard">Get:21 http://ru.archive.ubuntu.com/ubuntu noble-backports/main amd64 Packages [40.6 kB] <text:s text:c="4"/></text:p>
      <text:p text:style-name="Standard">Get:22 http://ru.archive.ubuntu.com/ubuntu noble-backports/main Translation-en [9172 B] <text:s/></text:p>
      <text:p text:style-name="Standard">Get:23 http://ru.archive.ubuntu.com/ubuntu noble-backports/main amd64 Components [5760 B] <text:s text:c="4"/></text:p>
      <text:p text:style-name="Standard">Get:24 http://ru.archive.ubuntu.com/ubuntu noble-backports/main amd64 c-n-f Metadata [368 B] <text:s text:c="3"/></text:p>
      <text:p text:style-name="Standard">Get:25 http://ru.archive.ubuntu.com/ubuntu noble-backports/restricted amd64 Components [212 B]</text:p>
      <text:p text:style-name="Standard">Get:26 http://ru.archive.ubuntu.com/ubuntu noble-backports/universe amd64 Packages [31.0 kB]</text:p>
      <text:p text:style-name="Standard">Get:27 http://ru.archive.ubuntu.com/ubuntu noble-backports/universe Translation-en [18.6 kB]</text:p>
      <text:p text:style-name="Standard">Get:28 http://ru.archive.ubuntu.com/ubuntu noble-backports/universe amd64 Components [10.5 kB]</text:p>
      <text:p text:style-name="Standard">Get:29 http://ru.archive.ubuntu.com/ubuntu noble-backports/universe amd64 c-n-f Metadata [1588 B]</text:p>
      <text:p text:style-name="Standard">Get:30 http://ru.archive.ubuntu.com/ubuntu noble-backports/multiverse amd64 Packages [748 B] <text:s text:c="11"/></text:p>
      <text:p text:style-name="Standard">Get:31 http://ru.archive.ubuntu.com/ubuntu noble-backports/multiverse Translation-en [340 B] <text:s text:c="4"/></text:p>
      <text:p text:style-name="Standard">Get:32 http://ru.archive.ubuntu.com/ubuntu noble-backports/multiverse amd64 Components [212 B] <text:s text:c="8"/></text:p>
      <text:p text:style-name="Standard">Get:33 http://security.ubuntu.com/ubuntu noble-security/main amd64 Packages [826 kB] <text:s text:c="20"/></text:p>
      <text:p text:style-name="Standard">Get:34 http://security.ubuntu.com/ubuntu noble-security/main Translation-en [186 kB]</text:p>
      <text:p text:style-name="Standard">Get:35 http://security.ubuntu.com/ubuntu noble-security/main amd64 Components [44.9 kB]</text:p>
      <text:p text:style-name="Standard">Get:36 http://security.ubuntu.com/ubuntu noble-security/main amd64 c-n-f Metadata [11.9 kB]</text:p>
      <text:p text:style-name="Standard">Get:37 http://security.ubuntu.com/ubuntu noble-security/restricted amd64 Packages [1133 kB]</text:p>
      <text:p text:style-name="Standard"><text:soft-page-break/>Get:38 http://security.ubuntu.com/ubuntu noble-security/restricted Translation-en [259 kB]</text:p>
      <text:p text:style-name="Standard">Get:39 http://security.ubuntu.com/ubuntu noble-security/restricted amd64 Components [212 B]</text:p>
      <text:p text:style-name="Standard">Get:40 http://security.ubuntu.com/ubuntu noble-security/restricted amd64 c-n-f Metadata [444 B]</text:p>
      <text:p text:style-name="Standard">Get:41 http://security.ubuntu.com/ubuntu noble-security/universe amd64 Packages [1173 kB]</text:p>
      <text:p text:style-name="Standard">Get:42 http://security.ubuntu.com/ubuntu noble-security/universe Translation-en [230 kB]</text:p>
      <text:p text:style-name="Standard">Get:43 http://security.ubuntu.com/ubuntu noble-security/universe amd64 Components [76.3 kB]</text:p>
      <text:p text:style-name="Standard">Get:44 http://security.ubuntu.com/ubuntu noble-security/universe amd64 c-n-f Metadata [24.2 kB]</text:p>
      <text:p text:style-name="Standard">Get:45 http://security.ubuntu.com/ubuntu noble-security/multiverse amd64 Packages [35.3 kB]</text:p>
      <text:p text:style-name="Standard">Get:46 http://security.ubuntu.com/ubuntu noble-security/multiverse Translation-en [10.1 kB]</text:p>
      <text:p text:style-name="Standard">Get:47 http://security.ubuntu.com/ubuntu noble-security/multiverse amd64 Components [208 B]</text:p>
      <text:p text:style-name="Standard">Get:48 http://security.ubuntu.com/ubuntu noble-security/multiverse amd64 c-n-f Metadata [468 B]</text:p>
      <text:p text:style-name="Standard">Fetched 9985 kB in 2s (4189 kB/s) <text:s text:c="15"/>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257 packages can be upgraded. Run 'apt list --upgradable' to see them.</text:p>
      <text:p text:style-name="Standard">root@eltex-practice2-v44:~# apt install dmesg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E: Unable to locate package dmesg</text:p>
      <text:p text:style-name="Standard">root@eltex-practice2-v44:~# which dmesg</text:p>
      <text:p text:style-name="Standard">/usr/bin/dmesg</text:p>
      <text:p text:style-name="Standard">root@eltex-practice2-v44:~# echo 'user1 ALL=(root) NOPASSWD: /usr/bin/dmesg' &gt; /etc/sudoers.d/user1-dmesg</text:p>
      <text:p text:style-name="Standard">chmod 440 /etc/sudoers.d/user1-dmesg</text:p>
      <text:p text:style-name="Standard">visudo -c</text:p>
      <text:p text:style-name="Standard">/etc/sudoers: parsed OK</text:p>
      <text:p text:style-name="Standard">/etc/sudoers.d/README: parsed OK</text:p>
      <text:p text:style-name="Standard">/etc/sudoers.d/user1-dmesg: parsed OK</text:p>
      <text:p text:style-name="Standard">root@eltex-practice2-v44:~# su - user1 -c 'sudo /usr/bin/dmesg | head'</text:p>
      <text:p text:style-name="Standard">[ <text:s text:c="3"/>0.000000] Linux version 6.8.0-55-generic (buildd@lcy02-amd64-095) (x86_64-linux-gnu-gcc-13 (Ubuntu 13.3.0-6ubuntu2~24.04) 13.3.0, GNU ld (GNU Binutils for Ubuntu) 2.42) #57-Ubuntu SMP PREEMPT_DYNAMIC Wed Feb 12 23:42:21 UTC 2025 (Ubuntu 6.8.0-55.57-generic 6.8.12)</text:p>
      <text:p text:style-name="Standard">[ <text:s text:c="3"/>0.000000] Command line: BOOT_IMAGE=/vmlinuz-6.8.0-55-generic root=/dev/mapper/ubuntu--vg-ubuntu--lv ro</text:p>
      <text:p text:style-name="Standard">[ <text:s text:c="3"/>0.000000] KERNEL supported cpus:</text:p>
      <text:p text:style-name="Standard">[ <text:s text:c="3"/>0.000000] <text:s text:c="2"/>Intel GenuineIntel</text:p>
      <text:p text:style-name="Standard">[ <text:s text:c="3"/>0.000000] <text:s text:c="2"/>AMD AuthenticAMD</text:p>
      <text:p text:style-name="Standard">[ <text:s text:c="3"/>0.000000] <text:s text:c="2"/>Hygon HygonGenuine</text:p>
      <text:p text:style-name="Standard">[ <text:s text:c="3"/>0.000000] <text:s text:c="2"/>Centaur CentaurHauls</text:p>
      <text:p text:style-name="Standard">[ <text:s text:c="3"/>0.000000] <text:s text:c="2"/>zhaoxin <text:s text:c="2"/>Shanghai <text:s/></text:p>
      <text:p text:style-name="Standard">[ <text:s text:c="3"/>0.000000] BIOS-provided physical RAM map:</text:p>
      <text:p text:style-name="Standard">[ <text:s text:c="3"/>0.000000] BIOS-e820: [mem 0x0000000000000000-0x000000000009fbff] usable</text:p>
      <text:p text:style-name="Standard">root@eltex-practice2-v44:~# cat &gt; /usr/local/bin/user2_dmesg.sh &lt;&lt;'EOF'</text:p>
      <text:p text:style-name="Standard">#!/bin/bash</text:p>
      <text:p text:style-name="Standard">/usr/bin/dmesg</text:p>
      <text:p text:style-name="Standard">EOF</text:p>
      <text:p text:style-name="Standard">root@eltex-practice2-v44:~# chown root:root /usr/local/bin/user2_dmesg.sh</text:p>
      <text:p text:style-name="Standard">chmod 4755 /usr/local/bin/user2_dmesg.sh</text:p>
      <text:p text:style-name="Standard">root@eltex-practice2-v44:~# ls -l /usr/local/bin/user2_dmesg.sh</text:p>
      <text:p text:style-name="Standard">-rwsr-xr-x 1 root root 27 Jul <text:s/>8 09:02 /usr/local/bin/user2_dmesg.sh</text:p>
      <text:p text:style-name="Standard"><text:soft-page-break/>root@eltex-practice2-v44:~# su - user2 -c '/usr/local/bin/user2_dmesg.sh | head'</text:p>
      <text:p text:style-name="Standard">dmesg: read kernel buffer failed: Operation not permitted</text:p>
      <text:p text:style-name="Standard">root@eltex-practice2-v44:~# version</text:p>
      <text:p text:style-name="Standard">version: command not found</text:p>
      <text:p text:style-name="Standard">root@eltex-practice2-v44:~# --version</text:p>
      <text:p text:style-name="Standard">--version: command not found</text:p>
      <text:p text:style-name="Standard">root@eltex-practice2-v44:~# linux --version</text:p>
      <text:p text:style-name="Standard">Command 'linux' not found, did you mean:</text:p>
      <text:p text:style-name="Standard"><text:s text:c="2"/>command 'linex' from snap linex (0.1.6)</text:p>
      <text:p text:style-name="Standard">See 'snap info &lt;snapname&gt;' for additional versions.</text:p>
      <text:p text:style-name="Standard">root@eltex-practice2-v44:~# cat /etc/os-release</text:p>
      <text:p text:style-name="Standard">PRETTY_NAME="Ubuntu 24.04.2 LTS"</text:p>
      <text:p text:style-name="Standard">NAME="Ubuntu"</text:p>
      <text:p text:style-name="Standard">VERSION_ID="24.04"</text:p>
      <text:p text:style-name="Standard">VERSION="24.04.2 LTS (Noble Numbat)"</text:p>
      <text:p text:style-name="Standard">VERSION_CODENAME=noble</text:p>
      <text:p text:style-name="Standard">ID=ubuntu</text:p>
      <text:p text:style-name="Standard">ID_LIKE=debian</text:p>
      <text:p text:style-name="Standard">HOME_URL="https://www.ubuntu.com/"</text:p>
      <text:p text:style-name="Standard">SUPPORT_URL="https://help.ubuntu.com/"</text:p>
      <text:p text:style-name="Standard">BUG_REPORT_URL="https://bugs.launchpad.net/ubuntu/"</text:p>
      <text:p text:style-name="Standard">PRIVACY_POLICY_URL="https://www.ubuntu.com/legal/terms-and-policies/privacy-policy"</text:p>
      <text:p text:style-name="Standard">UBUNTU_CODENAME=noble</text:p>
      <text:p text:style-name="Standard">LOGO=ubuntu-logo</text:p>
      <text:p text:style-name="Standard">root@eltex-practice2-v44:~# apt update</text:p>
      <text:p text:style-name="Standard">Hit:1 http://ru.archive.ubuntu.com/ubuntu noble InRelease</text:p>
      <text:p text:style-name="Standard">Hit:2 http://ru.archive.ubuntu.com/ubuntu noble-updates InRelease <text:s text:c="10"/></text:p>
      <text:p text:style-name="Standard">Hit:3 http://ru.archive.ubuntu.com/ubuntu noble-backports InRelease <text:s text:c="8"/></text:p>
      <text:p text:style-name="Standard">Hit:4 http://security.ubuntu.com/ubuntu noble-security InRelease <text:s text:c="11"/>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257 packages can be upgraded. Run 'apt list --upgradable' to see them.</text:p>
      <text:p text:style-name="Standard">root@eltex-practice2-v44:~# apt install -y gcc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binutils binutils-common binutils-x86-64-linux-gnu cpp cpp-13 cpp-13-x86-64-linux-gnu cpp-x86-64-linux-gnu gcc-13 gcc-13-base gcc-13-x86-64-linux-gnu gcc-14-base gcc-x86-64-linux-gnu libasan8</text:p>
      <text:p text:style-name="Standard"><text:s text:c="2"/>libatomic1 libbinutils libcc1-0 libctf-nobfd0 libctf0 libgcc-13-dev libgcc-s1 libgomp1 libgprofng0 libhwasan0 libisl23 libitm1 liblsan0 libmpc3 libquadmath0 libsframe1 libstdc++6 libtsan2 libubsan1</text:p>
      <text:p text:style-name="Standard">Suggested packages:</text:p>
      <text:p text:style-name="Standard"><text:s text:c="2"/>binutils-doc gprofng-gui cpp-doc gcc-13-locales cpp-13-doc gcc-multilib make autoconf automake libtool flex bison gdb gcc-doc gcc-13-multilib gcc-13-doc gdb-x86-64-linux-gnu</text:p>
      <text:p text:style-name="Standard">The following NEW packages will be installed:</text:p>
      <text:p text:style-name="Standard"><text:s text:c="2"/>binutils binutils-common binutils-x86-64-linux-gnu cpp cpp-13 cpp-13-x86-64-linux-gnu cpp-x86-64-linux-gnu gcc gcc-13 gcc-13-base gcc-13-x86-64-linux-gnu gcc-x86-64-linux-gnu libasan8 libatomic1</text:p>
      <text:p text:style-name="Standard"><text:soft-page-break/><text:s text:c="2"/>libbinutils libcc1-0 libctf-nobfd0 libctf0 libgcc-13-dev libgomp1 libgprofng0 libhwasan0 libisl23 libitm1 liblsan0 libmpc3 libquadmath0 libsframe1 libtsan2 libubsan1</text:p>
      <text:p text:style-name="Standard">The following packages will be upgraded:</text:p>
      <text:p text:style-name="Standard"><text:s text:c="2"/>gcc-14-base libgcc-s1 libstdc++6</text:p>
      <text:p text:style-name="Standard">3 upgraded, 30 newly installed, 0 to remove and 254 not upgraded.</text:p>
      <text:p text:style-name="Standard">Need to get 51.4 MB of archives.</text:p>
      <text:p text:style-name="Standard">After this operation, 167 MB of additional disk space will be used.</text:p>
      <text:p text:style-name="Standard">Get:1 http://ru.archive.ubuntu.com/ubuntu noble-updates/main amd64 gcc-14-base amd64 14.2.0-4ubuntu2~24.04.1 [51.0 kB]</text:p>
      <text:p text:style-name="Standard">Get:2 http://ru.archive.ubuntu.com/ubuntu noble-updates/main amd64 libstdc++6 amd64 14.2.0-4ubuntu2~24.04.1 [792 kB] <text:s text:c="86"/></text:p>
      <text:p text:style-name="Standard">Get:3 http://ru.archive.ubuntu.com/ubuntu noble-updates/main amd64 libgcc-s1 amd64 14.2.0-4ubuntu2~24.04.1 [78.4 kB] <text:s text:c="86"/></text:p>
      <text:p text:style-name="Standard">Get:4 http://ru.archive.ubuntu.com/ubuntu noble-updates/main amd64 binutils-common amd64 2.42-4ubuntu2.10 [240 kB] <text:s text:c="88"/></text:p>
      <text:p text:style-name="Standard">Get:5 http://ru.archive.ubuntu.com/ubuntu noble-updates/main amd64 libsframe1 amd64 2.42-4ubuntu2.10 [15.7 kB] <text:s text:c="92"/></text:p>
      <text:p text:style-name="Standard">Get:6 http://ru.archive.ubuntu.com/ubuntu noble-updates/main amd64 libbinutils amd64 2.42-4ubuntu2.10 [577 kB] <text:s text:c="92"/></text:p>
      <text:p text:style-name="Standard">Get:7 http://ru.archive.ubuntu.com/ubuntu noble-updates/main amd64 libctf-nobfd0 amd64 2.42-4ubuntu2.10 [98.0 kB] <text:s text:c="89"/></text:p>
      <text:p text:style-name="Standard">Get:8 http://ru.archive.ubuntu.com/ubuntu noble-updates/main amd64 libctf0 amd64 2.42-4ubuntu2.10 [94.5 kB] <text:s text:c="95"/></text:p>
      <text:p text:style-name="Standard">Get:9 http://ru.archive.ubuntu.com/ubuntu noble-updates/main amd64 libgprofng0 amd64 2.42-4ubuntu2.10 [849 kB] <text:s text:c="92"/></text:p>
      <text:p text:style-name="Standard">Get:10 http://ru.archive.ubuntu.com/ubuntu noble-updates/main amd64 binutils-x86-64-linux-gnu amd64 2.42-4ubuntu2.10 [2463 kB] <text:s text:c="76"/></text:p>
      <text:p text:style-name="Standard">Get:11 http://ru.archive.ubuntu.com/ubuntu noble-updates/main amd64 binutils amd64 2.42-4ubuntu2.10 [18.2 kB] <text:s text:c="93"/></text:p>
      <text:p text:style-name="Standard">Get:12 http://ru.archive.ubuntu.com/ubuntu noble-updates/main amd64 gcc-13-base amd64 13.3.0-6ubuntu2~24.04.1 [51.6 kB] <text:s text:c="83"/></text:p>
      <text:p text:style-name="Standard">Get:13 http://ru.archive.ubuntu.com/ubuntu noble-updates/main amd64 libisl23 amd64 0.26-3build1.1 [680 kB] <text:s text:c="96"/></text:p>
      <text:p text:style-name="Standard">Get:14 http://ru.archive.ubuntu.com/ubuntu noble-updates/main amd64 libmpc3 amd64 1.3.1-1build1.1 [54.6 kB] <text:s text:c="95"/></text:p>
      <text:p text:style-name="Standard">Get:15 http://ru.archive.ubuntu.com/ubuntu noble-updates/main amd64 cpp-13-x86-64-linux-gnu amd64 13.3.0-6ubuntu2~24.04.1 [10.7 MB] <text:s text:c="71"/></text:p>
      <text:p text:style-name="Standard">Get:16 http://ru.archive.ubuntu.com/ubuntu noble-updates/main amd64 cpp-13 amd64 13.3.0-6ubuntu2~24.04.1 [1042 B] <text:s text:c="89"/></text:p>
      <text:p text:style-name="Standard">Get:17 http://ru.archive.ubuntu.com/ubuntu noble/main amd64 cpp-x86-64-linux-gnu amd64 4:13.2.0-7ubuntu1 [5326 B] <text:s text:c="89"/></text:p>
      <text:p text:style-name="Standard">Get:18 http://ru.archive.ubuntu.com/ubuntu noble/main amd64 cpp amd64 4:13.2.0-7ubuntu1 [22.4 kB] <text:s text:c="105"/></text:p>
      <text:p text:style-name="Standard">Get:19 http://ru.archive.ubuntu.com/ubuntu noble-updates/main amd64 libcc1-0 amd64 14.2.0-4ubuntu2~24.04.1 [48.0 kB] <text:s text:c="86"/></text:p>
      <text:p text:style-name="Standard">Get:20 http://ru.archive.ubuntu.com/ubuntu noble-updates/main amd64 libgomp1 amd64 14.2.0-4ubuntu2~24.04.1 [148 kB] <text:s text:c="87"/></text:p>
      <text:p text:style-name="Standard">Get:21 http://ru.archive.ubuntu.com/ubuntu noble-updates/main amd64 libitm1 amd64 14.2.0-4ubuntu2~24.04.1 [29.7 kB] <text:s text:c="87"/></text:p>
      <text:p text:style-name="Standard">Get:22 http://ru.archive.ubuntu.com/ubuntu noble-updates/main amd64 libatomic1 amd64 14.2.0-4ubuntu2~24.04.1 [10.5 kB] <text:s text:c="84"/></text:p>
      <text:p text:style-name="Standard"><text:soft-page-break/>Get:23 http://ru.archive.ubuntu.com/ubuntu noble-updates/main amd64 libasan8 amd64 14.2.0-4ubuntu2~24.04.1 [3027 kB] <text:s text:c="86"/></text:p>
      <text:p text:style-name="Standard">Get:24 http://ru.archive.ubuntu.com/ubuntu noble-updates/main amd64 liblsan0 amd64 14.2.0-4ubuntu2~24.04.1 [1322 kB] <text:s text:c="86"/></text:p>
      <text:p text:style-name="Standard">Get:25 http://ru.archive.ubuntu.com/ubuntu noble-updates/main amd64 libtsan2 amd64 14.2.0-4ubuntu2~24.04.1 [2772 kB] <text:s text:c="86"/></text:p>
      <text:p text:style-name="Standard">Get:26 http://ru.archive.ubuntu.com/ubuntu noble-updates/main amd64 libubsan1 amd64 14.2.0-4ubuntu2~24.04.1 [1184 kB] <text:s text:c="85"/></text:p>
      <text:p text:style-name="Standard">Get:27 http://ru.archive.ubuntu.com/ubuntu noble-updates/main amd64 libhwasan0 amd64 14.2.0-4ubuntu2~24.04.1 [1641 kB] <text:s text:c="84"/></text:p>
      <text:p text:style-name="Standard">Get:28 http://ru.archive.ubuntu.com/ubuntu noble-updates/main amd64 libquadmath0 amd64 14.2.0-4ubuntu2~24.04.1 [153 kB] <text:s text:c="83"/></text:p>
      <text:p text:style-name="Standard">Get:29 http://ru.archive.ubuntu.com/ubuntu noble-updates/main amd64 libgcc-13-dev amd64 13.3.0-6ubuntu2~24.04.1 [2681 kB] <text:s text:c="81"/></text:p>
      <text:p text:style-name="Standard">Get:30 http://ru.archive.ubuntu.com/ubuntu noble-updates/main amd64 gcc-13-x86-64-linux-gnu amd64 13.3.0-6ubuntu2~24.04.1 [21.1 MB] <text:s text:c="71"/></text:p>
      <text:p text:style-name="Standard">Get:31 http://ru.archive.ubuntu.com/ubuntu noble-updates/main amd64 gcc-13 amd64 13.3.0-6ubuntu2~24.04.1 [494 kB] <text:s text:c="89"/></text:p>
      <text:p text:style-name="Standard">Get:32 http://ru.archive.ubuntu.com/ubuntu noble/main amd64 gcc-x86-64-linux-gnu amd64 4:13.2.0-7ubuntu1 [1212 B] <text:s text:c="89"/></text:p>
      <text:p text:style-name="Standard">Get:33 http://ru.archive.ubuntu.com/ubuntu noble/main amd64 gcc amd64 4:13.2.0-7ubuntu1 [5018 B] <text:s text:c="106"/></text:p>
      <text:p text:style-name="Standard">Fetched 51.4 MB in 25s (2058 kB/s) <text:s text:c="168"/></text:p>
      <text:p text:style-name="Standard">Extracting templates from packages: 100%</text:p>
      <text:p text:style-name="Standard">(Reading database ... 86670 files and directories currently installed.)</text:p>
      <text:p text:style-name="Standard">Preparing to unpack .../gcc-14-base_14.2.0-4ubuntu2~24.04.1_amd64.deb ...</text:p>
      <text:p text:style-name="Standard">Unpacking gcc-14-base:amd64 (14.2.0-4ubuntu2~24.04.1) over (14.2.0-4ubuntu2~24.04) ...</text:p>
      <text:p text:style-name="Standard">Setting up gcc-14-base:amd64 (14.2.0-4ubuntu2~24.04.1) ...</text:p>
      <text:p text:style-name="Standard">(Reading database ... 86670 files and directories currently installed.)</text:p>
      <text:p text:style-name="Standard">Preparing to unpack .../libstdc++6_14.2.0-4ubuntu2~24.04.1_amd64.deb ...</text:p>
      <text:p text:style-name="Standard">Unpacking libstdc++6:amd64 (14.2.0-4ubuntu2~24.04.1) over (14.2.0-4ubuntu2~24.04) ...</text:p>
      <text:p text:style-name="Standard">Setting up libstdc++6:amd64 (14.2.0-4ubuntu2~24.04.1) ...</text:p>
      <text:p text:style-name="Standard">(Reading database ... 86670 files and directories currently installed.)</text:p>
      <text:p text:style-name="Standard">Preparing to unpack .../libgcc-s1_14.2.0-4ubuntu2~24.04.1_amd64.deb ...</text:p>
      <text:p text:style-name="Standard">Unpacking libgcc-s1:amd64 (14.2.0-4ubuntu2~24.04.1) over (14.2.0-4ubuntu2~24.04) ...</text:p>
      <text:p text:style-name="Standard">Setting up libgcc-s1:amd64 (14.2.0-4ubuntu2~24.04.1) ...</text:p>
      <text:p text:style-name="Standard">Selecting previously unselected package binutils-common:amd64.</text:p>
      <text:p text:style-name="Standard">(Reading database ... 86670 files and directories currently installed.)</text:p>
      <text:p text:style-name="Standard">Preparing to unpack .../00-binutils-common_2.42-4ubuntu2.10_amd64.deb ...</text:p>
      <text:p text:style-name="Standard">Unpacking binutils-common:amd64 (2.42-4ubuntu2.10) ...</text:p>
      <text:p text:style-name="Standard">Selecting previously unselected package libsframe1:amd64.</text:p>
      <text:p text:style-name="Standard">Preparing to unpack .../01-libsframe1_2.42-4ubuntu2.10_amd64.deb ...</text:p>
      <text:p text:style-name="Standard">Unpacking libsframe1:amd64 (2.42-4ubuntu2.10) ...</text:p>
      <text:p text:style-name="Standard">Selecting previously unselected package libbinutils:amd64.</text:p>
      <text:p text:style-name="Standard">Preparing to unpack .../02-libbinutils_2.42-4ubuntu2.10_amd64.deb ...</text:p>
      <text:p text:style-name="Standard">Unpacking libbinutils:amd64 (2.42-4ubuntu2.10) ...</text:p>
      <text:p text:style-name="Standard">Selecting previously unselected package libctf-nobfd0:amd64.</text:p>
      <text:p text:style-name="Standard">Preparing to unpack .../03-libctf-nobfd0_2.42-4ubuntu2.10_amd64.deb ...</text:p>
      <text:p text:style-name="Standard">Unpacking libctf-nobfd0:amd64 (2.42-4ubuntu2.10) ...</text:p>
      <text:p text:style-name="Standard">Selecting previously unselected package libctf0:amd64.</text:p>
      <text:p text:style-name="Standard">Preparing to unpack .../04-libctf0_2.42-4ubuntu2.10_amd64.deb ...</text:p>
      <text:p text:style-name="Standard">Unpacking libctf0:amd64 (2.42-4ubuntu2.10) ...</text:p>
      <text:p text:style-name="Standard"><text:soft-page-break/>Selecting previously unselected package libgprofng0:amd64.</text:p>
      <text:p text:style-name="Standard">Preparing to unpack .../05-libgprofng0_2.42-4ubuntu2.10_amd64.deb ...</text:p>
      <text:p text:style-name="Standard">Unpacking libgprofng0:amd64 (2.42-4ubuntu2.10) ...</text:p>
      <text:p text:style-name="Standard">Selecting previously unselected package binutils-x86-64-linux-gnu.</text:p>
      <text:p text:style-name="Standard">Preparing to unpack .../06-binutils-x86-64-linux-gnu_2.42-4ubuntu2.10_amd64.deb ...</text:p>
      <text:p text:style-name="Standard">Unpacking binutils-x86-64-linux-gnu (2.42-4ubuntu2.10) ...</text:p>
      <text:p text:style-name="Standard">Selecting previously unselected package binutils.</text:p>
      <text:p text:style-name="Standard">Preparing to unpack .../07-binutils_2.42-4ubuntu2.10_amd64.deb ...</text:p>
      <text:p text:style-name="Standard">Unpacking binutils (2.42-4ubuntu2.10) ...</text:p>
      <text:p text:style-name="Standard">Selecting previously unselected package gcc-13-base:amd64.</text:p>
      <text:p text:style-name="Standard">Preparing to unpack .../08-gcc-13-base_13.3.0-6ubuntu2~24.04.1_amd64.deb ...</text:p>
      <text:p text:style-name="Standard">Unpacking gcc-13-base:amd64 (13.3.0-6ubuntu2~24.04.1) ...</text:p>
      <text:p text:style-name="Standard">Selecting previously unselected package libisl23:amd64.</text:p>
      <text:p text:style-name="Standard">Preparing to unpack .../09-libisl23_0.26-3build1.1_amd64.deb ...</text:p>
      <text:p text:style-name="Standard">Unpacking libisl23:amd64 (0.26-3build1.1) ...</text:p>
      <text:p text:style-name="Standard">Selecting previously unselected package libmpc3:amd64.</text:p>
      <text:p text:style-name="Standard">Preparing to unpack .../10-libmpc3_1.3.1-1build1.1_amd64.deb ...</text:p>
      <text:p text:style-name="Standard">Unpacking libmpc3:amd64 (1.3.1-1build1.1) ...</text:p>
      <text:p text:style-name="Standard">Selecting previously unselected package cpp-13-x86-64-linux-gnu.</text:p>
      <text:p text:style-name="Standard">Preparing to unpack .../11-cpp-13-x86-64-linux-gnu_13.3.0-6ubuntu2~24.04.1_amd64.deb ...</text:p>
      <text:p text:style-name="Standard">Unpacking cpp-13-x86-64-linux-gnu (13.3.0-6ubuntu2~24.04.1) ...</text:p>
      <text:p text:style-name="Standard">Selecting previously unselected package cpp-13.</text:p>
      <text:p text:style-name="Standard">Preparing to unpack .../12-cpp-13_13.3.0-6ubuntu2~24.04.1_amd64.deb ...</text:p>
      <text:p text:style-name="Standard">Unpacking cpp-13 (13.3.0-6ubuntu2~24.04.1) ...</text:p>
      <text:p text:style-name="Standard">Selecting previously unselected package cpp-x86-64-linux-gnu.</text:p>
      <text:p text:style-name="Standard">Preparing to unpack .../13-cpp-x86-64-linux-gnu_4%3a13.2.0-7ubuntu1_amd64.deb ...</text:p>
      <text:p text:style-name="Standard">Unpacking cpp-x86-64-linux-gnu (4:13.2.0-7ubuntu1) ...</text:p>
      <text:p text:style-name="Standard">Selecting previously unselected package cpp.</text:p>
      <text:p text:style-name="Standard">Preparing to unpack .../14-cpp_4%3a13.2.0-7ubuntu1_amd64.deb ...</text:p>
      <text:p text:style-name="Standard">Unpacking cpp (4:13.2.0-7ubuntu1) ...</text:p>
      <text:p text:style-name="Standard">Selecting previously unselected package libcc1-0:amd64.</text:p>
      <text:p text:style-name="Standard">Preparing to unpack .../15-libcc1-0_14.2.0-4ubuntu2~24.04.1_amd64.deb ...</text:p>
      <text:p text:style-name="Standard">Unpacking libcc1-0:amd64 (14.2.0-4ubuntu2~24.04.1) ...</text:p>
      <text:p text:style-name="Standard">Selecting previously unselected package libgomp1:amd64.</text:p>
      <text:p text:style-name="Standard">Preparing to unpack .../16-libgomp1_14.2.0-4ubuntu2~24.04.1_amd64.deb ...</text:p>
      <text:p text:style-name="Standard">Unpacking libgomp1:amd64 (14.2.0-4ubuntu2~24.04.1) ...</text:p>
      <text:p text:style-name="Standard">Selecting previously unselected package libitm1:amd64.</text:p>
      <text:p text:style-name="Standard">Preparing to unpack .../17-libitm1_14.2.0-4ubuntu2~24.04.1_amd64.deb ...</text:p>
      <text:p text:style-name="Standard">Unpacking libitm1:amd64 (14.2.0-4ubuntu2~24.04.1) ...</text:p>
      <text:p text:style-name="Standard">Selecting previously unselected package libatomic1:amd64.</text:p>
      <text:p text:style-name="Standard">Preparing to unpack .../18-libatomic1_14.2.0-4ubuntu2~24.04.1_amd64.deb ...</text:p>
      <text:p text:style-name="Standard">Unpacking libatomic1:amd64 (14.2.0-4ubuntu2~24.04.1) ...</text:p>
      <text:p text:style-name="Standard">Selecting previously unselected package libasan8:amd64.</text:p>
      <text:p text:style-name="Standard">Preparing to unpack .../19-libasan8_14.2.0-4ubuntu2~24.04.1_amd64.deb ...</text:p>
      <text:p text:style-name="Standard">Unpacking libasan8:amd64 (14.2.0-4ubuntu2~24.04.1) ...</text:p>
      <text:p text:style-name="Standard">Selecting previously unselected package liblsan0:amd64.</text:p>
      <text:p text:style-name="Standard">Preparing to unpack .../20-liblsan0_14.2.0-4ubuntu2~24.04.1_amd64.deb ...</text:p>
      <text:p text:style-name="Standard">Unpacking liblsan0:amd64 (14.2.0-4ubuntu2~24.04.1) ...</text:p>
      <text:p text:style-name="Standard">Selecting previously unselected package libtsan2:amd64.</text:p>
      <text:p text:style-name="Standard">Preparing to unpack .../21-libtsan2_14.2.0-4ubuntu2~24.04.1_amd64.deb ...</text:p>
      <text:p text:style-name="Standard">Unpacking libtsan2:amd64 (14.2.0-4ubuntu2~24.04.1) ...</text:p>
      <text:p text:style-name="Standard">Selecting previously unselected package libubsan1:amd64.</text:p>
      <text:p text:style-name="Standard"><text:soft-page-break/>Preparing to unpack .../22-libubsan1_14.2.0-4ubuntu2~24.04.1_amd64.deb ...</text:p>
      <text:p text:style-name="Standard">Unpacking libubsan1:amd64 (14.2.0-4ubuntu2~24.04.1) ...</text:p>
      <text:p text:style-name="Standard">Selecting previously unselected package libhwasan0:amd64.</text:p>
      <text:p text:style-name="Standard">Preparing to unpack .../23-libhwasan0_14.2.0-4ubuntu2~24.04.1_amd64.deb ...</text:p>
      <text:p text:style-name="Standard">Unpacking libhwasan0:amd64 (14.2.0-4ubuntu2~24.04.1) ...</text:p>
      <text:p text:style-name="Standard">Selecting previously unselected package libquadmath0:amd64.</text:p>
      <text:p text:style-name="Standard">Preparing to unpack .../24-libquadmath0_14.2.0-4ubuntu2~24.04.1_amd64.deb ...</text:p>
      <text:p text:style-name="Standard">Unpacking libquadmath0:amd64 (14.2.0-4ubuntu2~24.04.1) ...</text:p>
      <text:p text:style-name="Standard">Selecting previously unselected package libgcc-13-dev:amd64.</text:p>
      <text:p text:style-name="Standard">Preparing to unpack .../25-libgcc-13-dev_13.3.0-6ubuntu2~24.04.1_amd64.deb ...</text:p>
      <text:p text:style-name="Standard">Unpacking libgcc-13-dev:amd64 (13.3.0-6ubuntu2~24.04.1) ...</text:p>
      <text:p text:style-name="Standard">Selecting previously unselected package gcc-13-x86-64-linux-gnu.</text:p>
      <text:p text:style-name="Standard">Preparing to unpack .../26-gcc-13-x86-64-linux-gnu_13.3.0-6ubuntu2~24.04.1_amd64.deb ...</text:p>
      <text:p text:style-name="Standard">Unpacking gcc-13-x86-64-linux-gnu (13.3.0-6ubuntu2~24.04.1) ...</text:p>
      <text:p text:style-name="Standard">Selecting previously unselected package gcc-13.</text:p>
      <text:p text:style-name="Standard">Preparing to unpack .../27-gcc-13_13.3.0-6ubuntu2~24.04.1_amd64.deb ...</text:p>
      <text:p text:style-name="Standard">Unpacking gcc-13 (13.3.0-6ubuntu2~24.04.1) ...</text:p>
      <text:p text:style-name="Standard">Selecting previously unselected package gcc-x86-64-linux-gnu.</text:p>
      <text:p text:style-name="Standard">Preparing to unpack .../28-gcc-x86-64-linux-gnu_4%3a13.2.0-7ubuntu1_amd64.deb ...</text:p>
      <text:p text:style-name="Standard">Unpacking gcc-x86-64-linux-gnu (4:13.2.0-7ubuntu1) ...</text:p>
      <text:p text:style-name="Standard">Selecting previously unselected package gcc.</text:p>
      <text:p text:style-name="Standard">Preparing to unpack .../29-gcc_4%3a13.2.0-7ubuntu1_amd64.deb ...</text:p>
      <text:p text:style-name="Standard">Unpacking gcc (4:13.2.0-7ubuntu1) ...</text:p>
      <text:p text:style-name="Standard">Setting up binutils-common:amd64 (2.42-4ubuntu2.10) ...</text:p>
      <text:p text:style-name="Standard">Setting up libctf-nobfd0:amd64 (2.42-4ubuntu2.10) ...</text:p>
      <text:p text:style-name="Standard">Setting up libgomp1:amd64 (14.2.0-4ubuntu2~24.04.1) ...</text:p>
      <text:p text:style-name="Standard">Setting up libsframe1:amd64 (2.42-4ubuntu2.10) ...</text:p>
      <text:p text:style-name="Standard">Setting up gcc-13-base:amd64 (13.3.0-6ubuntu2~24.04.1) ...</text:p>
      <text:p text:style-name="Standard">Setting up libquadmath0:amd64 (14.2.0-4ubuntu2~24.04.1) ...</text:p>
      <text:p text:style-name="Standard">Setting up libmpc3:amd64 (1.3.1-1build1.1) ...</text:p>
      <text:p text:style-name="Standard">Setting up libatomic1:amd64 (14.2.0-4ubuntu2~24.04.1) ...</text:p>
      <text:p text:style-name="Standard">Setting up libubsan1:amd64 (14.2.0-4ubuntu2~24.04.1) ...</text:p>
      <text:p text:style-name="Standard">Setting up libhwasan0:amd64 (14.2.0-4ubuntu2~24.04.1) ...</text:p>
      <text:p text:style-name="Standard">Setting up libasan8:amd64 (14.2.0-4ubuntu2~24.04.1) ...</text:p>
      <text:p text:style-name="Standard">Setting up libtsan2:amd64 (14.2.0-4ubuntu2~24.04.1) ...</text:p>
      <text:p text:style-name="Standard">Setting up libbinutils:amd64 (2.42-4ubuntu2.10) ...</text:p>
      <text:p text:style-name="Standard">Setting up libisl23:amd64 (0.26-3build1.1) ...</text:p>
      <text:p text:style-name="Standard">Setting up libcc1-0:amd64 (14.2.0-4ubuntu2~24.04.1) ...</text:p>
      <text:p text:style-name="Standard">Setting up liblsan0:amd64 (14.2.0-4ubuntu2~24.04.1) ...</text:p>
      <text:p text:style-name="Standard">Setting up libitm1:amd64 (14.2.0-4ubuntu2~24.04.1) ...</text:p>
      <text:p text:style-name="Standard">Setting up libctf0:amd64 (2.42-4ubuntu2.10) ...</text:p>
      <text:p text:style-name="Standard">Setting up cpp-13-x86-64-linux-gnu (13.3.0-6ubuntu2~24.04.1) ...</text:p>
      <text:p text:style-name="Standard">Setting up libgprofng0:amd64 (2.42-4ubuntu2.10) ...</text:p>
      <text:p text:style-name="Standard">Setting up libgcc-13-dev:amd64 (13.3.0-6ubuntu2~24.04.1) ...</text:p>
      <text:p text:style-name="Standard">Setting up binutils-x86-64-linux-gnu (2.42-4ubuntu2.10) ...</text:p>
      <text:p text:style-name="Standard">Setting up cpp-x86-64-linux-gnu (4:13.2.0-7ubuntu1) ...</text:p>
      <text:p text:style-name="Standard">Setting up cpp-13 (13.3.0-6ubuntu2~24.04.1) ...</text:p>
      <text:p text:style-name="Standard">Setting up gcc-13-x86-64-linux-gnu (13.3.0-6ubuntu2~24.04.1) ...</text:p>
      <text:p text:style-name="Standard">Setting up binutils (2.42-4ubuntu2.10) ...</text:p>
      <text:p text:style-name="Standard">Setting up gcc-13 (13.3.0-6ubuntu2~24.04.1) ...</text:p>
      <text:p text:style-name="Standard">Setting up cpp (4:13.2.0-7ubuntu1) ...</text:p>
      <text:p text:style-name="Standard">Setting up gcc-x86-64-linux-gnu (4:13.2.0-7ubuntu1) ...</text:p>
      <text:p text:style-name="Standard"><text:soft-page-break/>Setting up gcc (4:13.2.0-7ubuntu1) ...</text:p>
      <text:p text:style-name="Standard">Processing triggers for man-db (2.12.0-4build2) ...</text:p>
      <text:p text:style-name="Standard">Processing triggers for libc-bin (2.39-0ubuntu8.4) ...</text:p>
      <text:p text:style-name="Standard">Scanning processes... <text:s text:c="182"/></text:p>
      <text:p text:style-name="Standard">Scanning candidates... <text:s text:c="181"/></text:p>
      <text:p text:style-name="Standard">Scanning linux images... <text:s text:c="179"/></text:p>
      <text:p text:style-name="Standard"/>
      <text:p text:style-name="Standard">Running kernel seems to be up-to-date.</text:p>
      <text:p text:style-name="Standard"/>
      <text:p text:style-name="Standard">Restarting services...</text:p>
      <text:p text:style-name="Standard"><text:s/>systemctl restart fwupd.service multipathd.service packagekit.service</text:p>
      <text:p text:style-name="Standard"/>
      <text:p text:style-name="Standard">Service restarts being deferred:</text:p>
      <text:p text:style-name="Standard"><text:s/>systemctl restart unattended-upgrades.service</text:p>
      <text:p text:style-name="Standard"/>
      <text:p text:style-name="Standard">No containers need to be restarted.</text:p>
      <text:p text:style-name="Standard"/>
      <text:p text:style-name="Standard">User sessions running outdated binaries:</text:p>
      <text:p text:style-name="Standard"><text:s/>root @ session #51: apt[3319], bash[2000]</text:p>
      <text:p text:style-name="Standard"/>
      <text:p text:style-name="Standard">No VM guests are running outdated hypervisor (qemu) binaries on this host.</text:p>
      <text:p text:style-name="Standard">root@eltex-practice2-v44:~# cat &gt; /tmp/user2_dmesg.c &lt;&lt;'EOF'</text:p>
      <text:p text:style-name="Standard">#include &lt;unistd.h&gt;</text:p>
      <text:p text:style-name="Standard"/>
      <text:p text:style-name="Standard">int main(void) {</text:p>
      <text:p text:style-name="Standard"><text:s text:c="4"/>setuid(0);</text:p>
      <text:p text:style-name="Standard"><text:s text:c="4"/>setgid(0);</text:p>
      <text:p text:style-name="Standard"><text:s text:c="4"/>execl("/usr/bin/dmesg", "dmesg", NULL);</text:p>
      <text:p text:style-name="Standard"><text:s text:c="4"/>return 1;</text:p>
      <text:p text:style-name="Standard">}</text:p>
      <text:p text:style-name="Standard">EOF</text:p>
      <text:p text:style-name="Standard">root@eltex-practice2-v44:~# gcc /tmp/user2_dmesg.c -o /usr/local/bin/user2_dmesg</text:p>
      <text:p text:style-name="Standard">root@eltex-practice2-v44:~# chown root:root /usr/local/bin/user2_dmesg</text:p>
      <text:p text:style-name="Standard">chmod 4755 /usr/local/bin/user2_dmesg</text:p>
      <text:p text:style-name="Standard">root@eltex-practice2-v44:~# ls -l /usr/local/bin/user2_dmesg</text:p>
      <text:p text:style-name="Standard">-rwsr-xr-x 1 root root 16056 Jul <text:s/>8 09:33 /usr/local/bin/user2_dmesg</text:p>
      <text:p text:style-name="Standard">root@eltex-practice2-v44:~# su - user2 -c '/usr/local/bin/user2_dmesg | head'</text:p>
      <text:p text:style-name="Standard">[ <text:s text:c="3"/>0.000000] Linux version 6.8.0-55-generic (buildd@lcy02-amd64-095) (x86_64-linux-gnu-gcc-13 (Ubuntu 13.3.0-6ubuntu2~24.04) 13.3.0, GNU ld (GNU Binutils for Ubuntu) 2.42) #57-Ubuntu SMP PREEMPT_DYNAMIC Wed Feb 12 23:42:21 UTC 2025 (Ubuntu 6.8.0-55.57-generic 6.8.12)</text:p>
      <text:p text:style-name="Standard">[ <text:s text:c="3"/>0.000000] Command line: BOOT_IMAGE=/vmlinuz-6.8.0-55-generic root=/dev/mapper/ubuntu--vg-ubuntu--lv ro</text:p>
      <text:p text:style-name="Standard">[ <text:s text:c="3"/>0.000000] KERNEL supported cpus:</text:p>
      <text:p text:style-name="Standard">[ <text:s text:c="3"/>0.000000] <text:s text:c="2"/>Intel GenuineIntel</text:p>
      <text:p text:style-name="Standard">[ <text:s text:c="3"/>0.000000] <text:s text:c="2"/>AMD AuthenticAMD</text:p>
      <text:p text:style-name="Standard">[ <text:s text:c="3"/>0.000000] <text:s text:c="2"/>Hygon HygonGenuine</text:p>
      <text:p text:style-name="Standard">[ <text:s text:c="3"/>0.000000] <text:s text:c="2"/>Centaur CentaurHauls</text:p>
      <text:p text:style-name="Standard">[ <text:s text:c="3"/>0.000000] <text:s text:c="2"/>zhaoxin <text:s text:c="2"/>Shanghai <text:s/></text:p>
      <text:p text:style-name="Standard">[ <text:s text:c="3"/>0.000000] BIOS-provided physical RAM map:</text:p>
      <text:p text:style-name="Standard">[ <text:s text:c="3"/>0.000000] BIOS-e820: [mem 0x0000000000000000-0x000000000009fbff] usable</text:p>
      <text:p text:style-name="Standard">root@eltex-practice2-v44:~#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8T16:46:29.984671144</meta:creation-date>
    <dc:date>2026-07-08T16:46:43.958010163</dc:date>
    <meta:editing-duration>PT14S</meta:editing-duration>
    <meta:editing-cycles>1</meta:editing-cycles>
    <meta:document-statistic meta:table-count="0" meta:image-count="0" meta:object-count="0" meta:page-count="8" meta:paragraph-count="354" meta:word-count="2004" meta:character-count="26630" meta:non-whitespace-character-count="21141"/>
    <meta:generator>LibreOffice/7.3.7.2$Linux_X86_64 LibreOffice_project/30$Build-2</meta:generator>
  </office:meta>
</office:document-meta>
</file>