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2BE152A908D31C78B05.png" manifest:media-type="image/png"/>
  <manifest:file-entry manifest:full-path="Pictures/10000001000004700000021C5D91CB7BC2C84525.png" manifest:media-type="image/png"/>
  <manifest:file-entry manifest:full-path="Pictures/10000001000003C8000001F606D3327C9E49828F.png" manifest:media-type="image/png"/>
  <manifest:file-entry manifest:full-path="Pictures/10000001000002F70000034FDD39E48FF9D922AF.png" manifest:media-type="image/png"/>
  <manifest:file-entry manifest:full-path="Pictures/10000001000002750000010DA7F1EBA15A325F6D.png" manifest:media-type="image/png"/>
  <manifest:file-entry manifest:full-path="Pictures/10000001000003430000018C0F1F8D7F96D68773.png" manifest:media-type="image/png"/>
  <manifest:file-entry manifest:full-path="Pictures/1000000100000390000001DA100FC95D43A4BE74.png" manifest:media-type="image/png"/>
  <manifest:file-entry manifest:full-path="Pictures/10000001000003E5000001FAAE1DAD2C2F4E3A47.png" manifest:media-type="image/png"/>
  <manifest:file-entry manifest:full-path="Pictures/1000000100000485000003F087E1E811E7BE5A14.png" manifest:media-type="image/png"/>
  <manifest:file-entry manifest:full-path="Pictures/10000001000004860000021D6A9E15C77311EB63.png" manifest:media-type="image/png"/>
  <manifest:file-entry manifest:full-path="Pictures/10000001000002CE00000274C35E6F51E6D7D4B9.png" manifest:media-type="image/png"/>
  <manifest:file-entry manifest:full-path="Pictures/10000001000003840000017F5EDE3C5A3E61A1DF.png" manifest:media-type="image/png"/>
  <manifest:file-entry manifest:full-path="Pictures/10000001000001C5000000512FE6693A38014A43.png" manifest:media-type="image/png"/>
  <manifest:file-entry manifest:full-path="Pictures/100000010000073A0000041D295BE545792CD778.png" manifest:media-type="image/png"/>
  <manifest:file-entry manifest:full-path="Pictures/10000001000002ED0000038C901E3CF917754950.png" manifest:media-type="image/png"/>
  <manifest:file-entry manifest:full-path="Pictures/10000001000002CE000000CCDCACA83E647C8EB7.png" manifest:media-type="image/png"/>
  <manifest:file-entry manifest:full-path="Pictures/100000010000073A0000041D1FABCDFDAED97DC7.png" manifest:media-type="image/png"/>
  <manifest:file-entry manifest:full-path="Pictures/100000010000073A0000041DAC1B6691FEE775B1.png" manifest:media-type="image/png"/>
  <manifest:file-entry manifest:full-path="Pictures/10000001000002CE0000017F10EDB3D3FD062163.png" manifest:media-type="image/png"/>
  <manifest:file-entry manifest:full-path="Pictures/10000001000002E3000001DA68887F5190E8E32D.png" manifest:media-type="image/png"/>
  <manifest:file-entry manifest:full-path="Pictures/100000010000073A0000041D23BEA732C20AE0F6.png" manifest:media-type="image/png"/>
  <manifest:file-entry manifest:full-path="Pictures/10000001000002CE0000016DDA8476D85B2BE223.png" manifest:media-type="image/png"/>
  <manifest:file-entry manifest:full-path="Pictures/10000001000002CE000002525C9920BA3B03BA84.png" manifest:media-type="image/png"/>
  <manifest:file-entry manifest:full-path="Pictures/10000001000002CE000000F22D826292E71A3911.png" manifest:media-type="image/png"/>
  <manifest:file-entry manifest:full-path="Pictures/10000001000002CE0000013BCB99A06FB1672D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822ba" officeooo:paragraph-rsid="000822b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22ba" officeooo:paragraph-rsid="000a92f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822ba" officeooo:paragraph-rsid="000bd28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822ba" officeooo:paragraph-rsid="000cd08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822ba" officeooo:paragraph-rsid="000d74b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822ba" officeooo:paragraph-rsid="000e885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822ba" officeooo:paragraph-rsid="000feacc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822ba" officeooo:paragraph-rsid="0011d4da" style:font-size-asian="14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officeooo:rsid="000822ba" officeooo:paragraph-rsid="0011d4da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822ba" officeooo:paragraph-rsid="0013de00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58e95" officeooo:paragraph-rsid="00158e95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58e95" officeooo:paragraph-rsid="00179f5f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89ab1" officeooo:paragraph-rsid="00189ab1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8d43a" officeooo:paragraph-rsid="0018d43a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0822ba" officeooo:paragraph-rsid="000822ba" style:font-size-asian="20pt" style:font-size-complex="20pt"/>
    </style:style>
    <style:style style:name="T1" style:family="text">
      <style:text-properties officeooo:rsid="000835d3"/>
    </style:style>
    <style:style style:name="T2" style:family="text">
      <style:text-properties officeooo:rsid="0008d2ea"/>
    </style:style>
    <style:style style:name="T3" style:family="text">
      <style:text-properties officeooo:rsid="000a92f9"/>
    </style:style>
    <style:style style:name="T4" style:family="text">
      <style:text-properties officeooo:rsid="000feacc"/>
    </style:style>
    <style:style style:name="T5" style:family="text">
      <style:text-properties officeooo:rsid="00114091"/>
    </style:style>
    <style:style style:name="T6" style:family="text">
      <style:text-properties officeooo:rsid="0013de00"/>
    </style:style>
    <style:style style:name="T7" style:family="text">
      <style:text-properties officeooo:rsid="0014b3b4"/>
    </style:style>
    <style:style style:name="T8" style:family="text">
      <style:text-properties officeooo:rsid="00179f5f"/>
    </style:style>
    <style:style style:name="T9" style:family="text">
      <style:text-properties officeooo:rsid="00189a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Раздел 1</text:p>
      <text:p text:style-name="P1">Задание <text:span text:style-name="T1">0</text:span></text:p>
      <text:p text:style-name="P1"/>
      <text:p text:style-name="P1"><draw:frame draw:style-name="fr1" draw:name="Image1" text:anchor-type="as-char" svg:width="6.6929in" svg:height="4.2925in" draw:z-index="0"><draw:image xlink:href="Pictures/10000001000002E3000001DA68887F5190E8E32D.png" xlink:type="simple" xlink:show="embed" xlink:actuate="onLoad" draw:mime-type="image/png"/></draw:frame><text:line-break/><text:span text:style-name="T1">Задание 1</text:span></text:p>
      <text:p text:style-name="P1"/>
      <text:p text:style-name="P1"><draw:frame draw:style-name="fr3" draw:name="Image2" text:anchor-type="as-char" svg:width="4.7189in" svg:height="0.8437in" draw:z-index="1"><draw:image xlink:href="Pictures/10000001000001C5000000512FE6693A38014A43.png" xlink:type="simple" xlink:show="embed" xlink:actuate="onLoad" draw:mime-type="image/png"/></draw:frame></text:p>
      <text:p text:style-name="P2"><text:soft-page-break/><draw:frame draw:style-name="fr1" draw:name="Image3" text:anchor-type="as-char" svg:width="6.6929in" svg:height="8.1134in" draw:z-index="2"><draw:image xlink:href="Pictures/10000001000002ED0000038C901E3CF917754950.png" xlink:type="simple" xlink:show="embed" xlink:actuate="onLoad" draw:mime-type="image/png"/></draw:frame><text:line-break/><text:line-break/><text:span text:style-name="T2">Задание 2<text:line-break/></text:span></text:p>
      <text:p text:style-name="P2"><text:soft-page-break/><text:span text:style-name="T2"><draw:frame draw:style-name="fr1" draw:name="Image4" text:anchor-type="as-char" svg:width="6.6929in" svg:height="3.8091in" draw:z-index="3"><draw:image xlink:href="Pictures/100000010000073A0000041D1FABCDFDAED97DC7.png" xlink:type="simple" xlink:show="embed" xlink:actuate="onLoad" draw:mime-type="image/png"/></draw:frame></text:span><text:span text:style-name="T2"><draw:frame draw:style-name="fr1" draw:name="Image6" text:anchor-type="as-char" svg:width="6.6929in" svg:height="3.8091in" draw:z-index="5"><draw:image xlink:href="Pictures/100000010000073A0000041D295BE545792CD778.png" xlink:type="simple" xlink:show="embed" xlink:actuate="onLoad" draw:mime-type="image/png"/></draw:frame></text:span><text:span text:style-name="T2"><draw:frame draw:style-name="fr6" draw:name="Image8" text:anchor-type="as-char" svg:width="6.6929in" svg:height="1.9016in" draw:z-index="7"><draw:image xlink:href="Pictures/10000001000002CE000000CCDCACA83E647C8EB7.png" xlink:type="simple" xlink:show="embed" xlink:actuate="onLoad" draw:mime-type="image/png"/></draw:frame></text:span><text:soft-page-break/><text:span text:style-name="T2"><draw:frame draw:style-name="fr1" draw:name="Image7" text:anchor-type="as-char" svg:width="6.6929in" svg:height="3.8091in" draw:z-index="6"><draw:image xlink:href="Pictures/100000010000073A0000041D23BEA732C20AE0F6.png" xlink:type="simple" xlink:show="embed" xlink:actuate="onLoad" draw:mime-type="image/png"/></draw:frame></text:span><text:span text:style-name="T2"><text:line-break/><text:line-break/></text:span><draw:frame draw:style-name="fr2" draw:name="Image5" text:anchor-type="char" svg:width="6.6929in" svg:height="3.8091in" draw:z-index="4"><draw:image xlink:href="Pictures/100000010000073A0000041DAC1B6691FEE775B1.png" xlink:type="simple" xlink:show="embed" xlink:actuate="onLoad" draw:mime-type="image/png"/></draw:frame><text:span text:style-name="T3">Задание 3<text:line-break/><text:line-break/>Connection to 172.16.9.218 closed.</text:span></text:p>
      <text:p text:style-name="P2">eltex-v44@eltex-2026-summer:~$ cat ~/.ssh/practice2_eltex-v44_key.pub</text:p>
      <text:p text:style-name="P2">+ cat /home/eltex-v44/.ssh/practice2_eltex-v44_key.pub</text:p>
      <text:p text:style-name="P2">ssh-ed25519 AAAAC3NzaC1lZDI1NTE5AAAAIAWC60A8+uLboWaBKi7uoxWbfstjDLwJSDdG0veu/sBm practice2_eltex-v44</text:p>
      <text:p text:style-name="P2"><text:soft-page-break/>eltex-v44@eltex-2026-summer:~$ ls -l ~/.ssh/practice2_eltex-v44_key.pub</text:p>
      <text:p text:style-name="P2">+ ls --color=auto -l /home/eltex-v44/.ssh/practice2_eltex-v44_key.pub</text:p>
      <text:p text:style-name="P2">-rw-r--r-- 1 eltex-v44 eltex-v44 101 июл <text:s/>8 12:13 /home/eltex-v44/.ssh/practice2_eltex-v44_key.pub</text:p>
      <text:p text:style-name="P2">eltex-v44@eltex-2026-summer:~$ scp ~/.ssh/practice2_eltex-v44_key.pub root@172.16.9.218:/root/server1 _practice2_eltex-v44_key.pub</text:p>
      <text:p text:style-name="P2">+ scp /home/eltex-v44/.ssh/practice2_eltex-v44_key.pub root@172.16.9.218:/root/server1 _practice2_eltex-v44_key.pub</text:p>
      <text:p text:style-name="P2">_practice2_eltex-v44_key.pub: No such file or directory</text:p>
      <text:p text:style-name="P2">eltex-v44@eltex-2026-summer:~$ scp ~/.ssh/practice2_eltex-v44_key.pub root@172.16.9.218:/root/server1_practice2_eltex-v44_key.pub</text:p>
      <text:p text:style-name="P2">+ scp /home/eltex-v44/.ssh/practice2_eltex-v44_key.pub root@172.16.9.218:/root/server1_practice2_eltex-v44_key.pub</text:p>
      <text:p text:style-name="P2">root@172.16.9.218's password: </text:p>
      <text:p text:style-name="P3">eltex-v44@eltex-2026-summer:~$ </text:p>
      <text:p text:style-name="P4"><draw:frame draw:style-name="fr6" draw:name="Image9" text:anchor-type="as-char" svg:width="6.6929in" svg:height="3.402in" draw:z-index="8"><draw:image xlink:href="Pictures/10000001000002CE0000016DDA8476D85B2BE223.png" xlink:type="simple" xlink:show="embed" xlink:actuate="onLoad" draw:mime-type="image/png"/></draw:frame><text:line-break/><text:line-break/></text:p>
      <text:p text:style-name="P4"><draw:frame draw:style-name="fr6" draw:name="Image10" text:anchor-type="as-char" svg:width="6.6929in" svg:height="2.2555in" draw:z-index="9"><draw:image xlink:href="Pictures/10000001000002CE000000F22D826292E71A3911.png" xlink:type="simple" xlink:show="embed" xlink:actuate="onLoad" draw:mime-type="image/png"/></draw:frame></text:p>
      <text:p text:style-name="P4"><text:soft-page-break/></text:p>
      <text:p text:style-name="P4"><draw:frame draw:style-name="fr1" draw:name="Image11" text:anchor-type="as-char" svg:width="6.6929in" svg:height="5.5366in" draw:z-index="10"><draw:image xlink:href="Pictures/10000001000002CE000002525C9920BA3B03BA84.png" xlink:type="simple" xlink:show="embed" xlink:actuate="onLoad" draw:mime-type="image/png"/></draw:frame><draw:frame draw:style-name="fr1" draw:name="Image12" text:anchor-type="as-char" svg:width="6.6929in" svg:height="3.5701in" draw:z-index="11"><draw:image xlink:href="Pictures/10000001000002CE0000017F10EDB3D3FD062163.png" xlink:type="simple" xlink:show="embed" xlink:actuate="onLoad" draw:mime-type="image/png"/></draw:frame><text:line-break/><text:line-break/><text:line-break/><text:soft-page-break/><text:line-break/><text:line-break/><text:line-break/>root@eltex-practice2-v44:~# echo "=== Права на копию публичного ключа с сервера 1 ==="</text:p>
      <text:p text:style-name="P4">ls -l /root/server1_practice2_eltex-v44_key.pub</text:p>
      <text:p text:style-name="P4"/>
      <text:p text:style-name="P4">echo "=== Права на каталог /root/.ssh сервера 2 ==="</text:p>
      <text:p text:style-name="P4">ls -ld /root/.ssh</text:p>
      <text:p text:style-name="P4"/>
      <text:p text:style-name="P4">echo "=== Права на authorized_keys сервера 2 ==="</text:p>
      <text:p text:style-name="P4">ls -l /root/.ssh/authorized_keys</text:p>
      <text:p text:style-name="P4">=== Права на копию публичного ключа с сервера 1 ===</text:p>
      <text:p text:style-name="P4">-rw-r--r-- 1 root root 101 Jul <text:s/>8 06:18 /root/server1_practice2_eltex-v44_key.pub</text:p>
      <text:p text:style-name="P4">=== Права на каталог /root/.ssh сервера 2 ===</text:p>
      <text:p text:style-name="P4">drwx------ 2 root root 4096 Mar 12 <text:s/>2025 /root/.ssh</text:p>
      <text:p text:style-name="P4">=== Права на authorized_keys сервера 2 ===</text:p>
      <text:p text:style-name="P4">-rw------- 1 root root 101 Jul <text:s/>8 05:26 /root/.ssh/authorized_keys</text:p>
      <text:p text:style-name="P4">root@eltex-practice2-v44:~# </text:p>
      <text:p text:style-name="P4"><draw:frame draw:style-name="fr1" draw:name="Image13" text:anchor-type="as-char" svg:width="6.6929in" svg:height="2.9362in" draw:z-index="12"><draw:image xlink:href="Pictures/10000001000002CE0000013BCB99A06FB1672DD0.png" xlink:type="simple" xlink:show="embed" xlink:actuate="onLoad" draw:mime-type="image/png"/></draw:frame><text:line-break/><text:line-break/><text:line-break/>echo "=== Вывод по заданию 3 ==="</text:p>
      <text:p text:style-name="P4">echo "Открытый ключ с сервера 1 содержится в /root/.ssh/authorized_keys на сервере 2."</text:p>
      <text:p text:style-name="P4">echo "Права /root/.ssh: только root имеет доступ к каталогу."</text:p>
      <text:p text:style-name="P4">echo "Права /root/.ssh/authorized_keys: только root имеет чтение и запись."</text:p>
      <text:p text:style-name="P4"><text:soft-page-break/></text:p>
      <text:p text:style-name="P5">cat /root/server1_practice2_eltex-v44_key.pub </text:p>
      <text:p text:style-name="P5">cat /root/.ssh/authorized_keys </text:p>
      <text:p text:style-name="P6">grep -F -f /root/server1_practice2_eltex-v44_key.pub /root/.ssh/authorized_keys </text:p>
      <text:p text:style-name="P6">ls -l /root/server1_practice2_eltex-v44_key.pub </text:p>
      <text:p text:style-name="P6">ls -ld /root/.ssh </text:p>
      <text:p text:style-name="P6">ls -l /root/.ssh/authorized_keys<text:line-break/><text:line-break/><text:line-break/><text:line-break/></text:p>
      <text:p text:style-name="P5"/>
      <text:p text:style-name="P5"/>
      <text:p text:style-name="P7"><draw:frame draw:style-name="fr1" draw:name="Image14" text:anchor-type="as-char" svg:width="6.6929in" svg:height="5.8535in" draw:z-index="13"><draw:image xlink:href="Pictures/10000001000002CE00000274C35E6F51E6D7D4B9.png" xlink:type="simple" xlink:show="embed" xlink:actuate="onLoad" draw:mime-type="image/png"/></draw:frame><text:line-break/><text:line-break/><text:span text:style-name="T4">Задание 4<text:line-break/></text:span><text:soft-page-break/><text:span text:style-name="T4"><text:line-break/><text:line-break/>root@eltex-practice2-v44:~# id user1</text:span></text:p>
      <text:p text:style-name="P7"><text:span text:style-name="T4">id: ‘user1’: no such user</text:span></text:p>
      <text:p text:style-name="P7"><text:span text:style-name="T4">root@eltex-practice2-v44:~# useradd -m -s /bin/bash user1</text:span></text:p>
      <text:p text:style-name="P7"><text:span text:style-name="T4">root@eltex-practice2-v44:~# passwd user1</text:span></text:p>
      <text:p text:style-name="P7"><text:span text:style-name="T4">New password: </text:span></text:p>
      <text:p text:style-name="P7"><text:span text:style-name="T4">Retype new password: </text:span></text:p>
      <text:p text:style-name="P7"><text:span text:style-name="T4">passwd: password updated successfully</text:span></text:p>
      <text:p text:style-name="P7"><text:span text:style-name="T4">root@eltex-practice2-v44:~# grep `^user1:` /etc/passwd</text:span></text:p>
      <text:p text:style-name="P7"><text:span text:style-name="T4">^user1:: command not found</text:span></text:p>
      <text:p text:style-name="P7"><text:span text:style-name="T4">^C</text:span></text:p>
      <text:p text:style-name="P7"><text:span text:style-name="T4">root@eltex-practice2-v44:~# grep '^user1:' /etc/passwd</text:span></text:p>
      <text:p text:style-name="P7"><text:span text:style-name="T4">user1:x:1001:1001::/home/user1:/bin/bash</text:span></text:p>
      <text:p text:style-name="P7"><text:span text:style-name="T4">root@eltex-practice2-v44:~# ls -ld /home/user1</text:span></text:p>
      <text:p text:style-name="P7"><text:span text:style-name="T4">drwxr-x--- 2 user1 user1 4096 Jul <text:s/>8 06:57 /home/user1</text:span></text:p>
      <text:p text:style-name="P7"><text:span text:style-name="T4">root@eltex-practice2-v44:~# su - user1</text:span></text:p>
      <text:p text:style-name="P7"><text:span text:style-name="T4">user1@eltex-practice2-v44:~$ whoami</text:span></text:p>
      <text:p text:style-name="P7"><text:span text:style-name="T4">user1</text:span></text:p>
      <text:p text:style-name="P7"><text:span text:style-name="T4">user1@eltex-practice2-v44:~$ pwd</text:span></text:p>
      <text:p text:style-name="P7"><text:span text:style-name="T4">/home/user1</text:span></text:p>
      <text:p text:style-name="P7"><text:span text:style-name="T4">user1@eltex-practice2-v44:~$ echo $SHELL</text:span></text:p>
      <text:p text:style-name="P7"><text:span text:style-name="T4">/bin/bash</text:span></text:p>
      <text:p text:style-name="P7"><text:span text:style-name="T4">user1@eltex-practice2-v44:~$ exit</text:span></text:p>
      <text:p text:style-name="P7"><text:span text:style-name="T4">logout</text:span></text:p>
      <text:p text:style-name="P7"><text:span text:style-name="T4">root@eltex-practice2-v44:~# echo "=== Пункт 4 выполнен ==="</text:span></text:p>
      <text:p text:style-name="P7"><text:span text:style-name="T4">echo "Пользователь user1 создан командой useradd с домашним каталогом /home/user1 и shell /bin/bash. Пароль для user1 задан."</text:span></text:p>
      <text:p text:style-name="P7"><text:span text:style-name="T4">=== Пункт 4 выполнен ===</text:span></text:p>
      <text:p text:style-name="P7"><text:span text:style-name="T4">Пользователь user1 создан командой useradd с домашним каталогом /home/user1 и shell /bin/bash. Пароль для user1 задан.</text:span></text:p>
      <text:p text:style-name="P7"><text:span text:style-name="T4">root@eltex-practice2-v44:~# ^C</text:span></text:p>
      <text:p text:style-name="P7"><text:soft-page-break/><text:span text:style-name="T4">root@eltex-practice2-v44:~# <text:line-break/></text:span><text:span text:style-name="T4"><draw:frame draw:style-name="fr6" draw:name="Image15" text:anchor-type="as-char" svg:width="6.6929in" svg:height="3.1264in" draw:z-index="14"><draw:image xlink:href="Pictures/10000001000004860000021D6A9E15C77311EB63.png" xlink:type="simple" xlink:show="embed" xlink:actuate="onLoad" draw:mime-type="image/png"/></draw:frame></text:span><text:span text:style-name="T4"><text:line-break/><text:line-break/><text:line-break/><text:line-break/></text:span><text:span text:style-name="T5">Задание 5<text:line-break/><text:line-break/>root@eltex-practice2-v44:~# id user2</text:span></text:p>
      <text:p text:style-name="P7">id: ‘user2’: no such user</text:p>
      <text:p text:style-name="P7">root@eltex-practice2-v44:~# id user3</text:p>
      <text:p text:style-name="P7">id: ‘user3’: no such user</text:p>
      <text:p text:style-name="P7">root@eltex-practice2-v44:~# adduser user2</text:p>
      <text:p text:style-name="P7">info: Adding user `user2' ...</text:p>
      <text:p text:style-name="P7">info: Selecting UID/GID from range 1000 to 59999 ...</text:p>
      <text:p text:style-name="P7">info: Adding new group `user2' (1002) ...</text:p>
      <text:p text:style-name="P7">info: Adding new user `user2' (1002) with group `user2 (1002)' ...</text:p>
      <text:p text:style-name="P7">info: Creating home directory `/home/user2' ...</text:p>
      <text:p text:style-name="P7">info: Copying files from `/etc/skel' ...</text:p>
      <text:p text:style-name="P7">New password: </text:p>
      <text:p text:style-name="P7">Retype new password: </text:p>
      <text:p text:style-name="P7">passwd: password updated successfully</text:p>
      <text:p text:style-name="P7">Changing the user information for user2</text:p>
      <text:p text:style-name="P7">Enter the new value, or press ENTER for the default</text:p>
      <text:p text:style-name="P7"><text:tab/>Full Name []: </text:p>
      <text:p text:style-name="P7"><text:tab/>Room Number []: </text:p>
      <text:p text:style-name="P7"><text:tab/>Work Phone []: </text:p>
      <text:p text:style-name="P7"><text:tab/>Home Phone []: </text:p>
      <text:p text:style-name="P7"><text:tab/>Other []: </text:p>
      <text:p text:style-name="P7"><text:soft-page-break/>Is the information correct? [Y/n] Y</text:p>
      <text:p text:style-name="P7">info: Adding new user `user2' to supplemental / extra groups `users' ...</text:p>
      <text:p text:style-name="P7">info: Adding user `user2' to group `users' ...</text:p>
      <text:p text:style-name="P7">root@eltex-practice2-v44:~# adduser user3</text:p>
      <text:p text:style-name="P7">info: Adding user `user3' ...</text:p>
      <text:p text:style-name="P7">info: Selecting UID/GID from range 1000 to 59999 ...</text:p>
      <text:p text:style-name="P7">info: Adding new group `user3' (1003) ...</text:p>
      <text:p text:style-name="P7">info: Adding new user `user3' (1003) with group `user3 (1003)' ...</text:p>
      <text:p text:style-name="P7">info: Creating home directory `/home/user3' ...</text:p>
      <text:p text:style-name="P7">info: Copying files from `/etc/skel' ...</text:p>
      <text:p text:style-name="P7">New password: </text:p>
      <text:p text:style-name="P7">Retype new password: </text:p>
      <text:p text:style-name="P7">Sorry, passwords do not match.</text:p>
      <text:p text:style-name="P7">passwd: Authentication token manipulation error</text:p>
      <text:p text:style-name="P7">passwd: password unchanged</text:p>
      <text:p text:style-name="P7">Try again? [y/N] y</text:p>
      <text:p text:style-name="P7">New password: </text:p>
      <text:p text:style-name="P7">Retype new password: </text:p>
      <text:p text:style-name="P7">passwd: password updated successfully</text:p>
      <text:p text:style-name="P7">Changing the user information for user3</text:p>
      <text:p text:style-name="P7">Enter the new value, or press ENTER for the default</text:p>
      <text:p text:style-name="P7"><text:tab/>Full Name []: </text:p>
      <text:p text:style-name="P7"><text:tab/>Room Number []: </text:p>
      <text:p text:style-name="P7"><text:tab/>Work Phone []: </text:p>
      <text:p text:style-name="P7"><text:tab/>Home Phone []: </text:p>
      <text:p text:style-name="P7"><text:tab/>Other []: </text:p>
      <text:p text:style-name="P7">Is the information correct? [Y/n] Y</text:p>
      <text:p text:style-name="P7">info: Adding new user `user3' to supplemental / extra groups `users' ...</text:p>
      <text:p text:style-name="P7">info: Adding user `user3' to group `users' ...</text:p>
      <text:p text:style-name="P7">root@eltex-practice2-v44:~# grep '^user2:' /etc/passwd</text:p>
      <text:p text:style-name="P7">user2:x:1002:1002:,,,:/home/user2:/bin/bash</text:p>
      <text:p text:style-name="P7">root@eltex-practice2-v44:~# grep '^user3:' /etc/passwd</text:p>
      <text:p text:style-name="P7">user3:x:1003:1003:,,,:/home/user3:/bin/bash</text:p>
      <text:p text:style-name="P7">root@eltex-practice2-v44:~# ls -ld /home/user2</text:p>
      <text:p text:style-name="P7">drwxr-x--- 2 user2 user2 4096 Jul <text:s/>8 07:09 /home/user2</text:p>
      <text:p text:style-name="P7">root@eltex-practice2-v44:~# ls -ld /home/user3</text:p>
      <text:p text:style-name="P7">drwxr-x--- 2 user3 user3 4096 Jul <text:s/>8 07:12 /home/user3</text:p>
      <text:p text:style-name="P7">root@eltex-practice2-v44:~# su - user2</text:p>
      <text:p text:style-name="P7">user2@eltex-practice2-v44:~$ whoami</text:p>
      <text:p text:style-name="P7"><text:soft-page-break/>user2</text:p>
      <text:p text:style-name="P7">user2@eltex-practice2-v44:~$ pwd</text:p>
      <text:p text:style-name="P7">/home/user2</text:p>
      <text:p text:style-name="P7">user2@eltex-practice2-v44:~$ echo $SHELL</text:p>
      <text:p text:style-name="P7">/bin/bash</text:p>
      <text:p text:style-name="P7">user2@eltex-practice2-v44:~$ exit</text:p>
      <text:p text:style-name="P7">logout</text:p>
      <text:p text:style-name="P7">root@eltex-practice2-v44:~# su - user3</text:p>
      <text:p text:style-name="P7">user3@eltex-practice2-v44:~$ whoami</text:p>
      <text:p text:style-name="P7">user3</text:p>
      <text:p text:style-name="P7">user3@eltex-practice2-v44:~$ pwd</text:p>
      <text:p text:style-name="P7">/home/user3</text:p>
      <text:p text:style-name="P7">user3@eltex-practice2-v44:~$ echo $SHELL</text:p>
      <text:p text:style-name="P7">/bin/bash</text:p>
      <text:p text:style-name="P7">user3@eltex-practice2-v44:~$ exit</text:p>
      <text:p text:style-name="P7">logout</text:p>
      <text:p text:style-name="P7">root@eltex-practice2-v44:~# echo "=== Пункт 5 выполнен ==="</text:p>
      <text:p text:style-name="P7">echo "Пользователи user2 и user3 созданы командой adduser. Домашние каталоги и shell /bin/bash проверены."</text:p>
      <text:p text:style-name="P7">=== Пункт 5 выполнен ===</text:p>
      <text:p text:style-name="P7">Пользователи user2 и user3 созданы командой adduser. Домашние каталоги и shell /bin/bash проверены.</text:p>
      <text:p text:style-name="P8">root@eltex-practice2-v44:~# <text:line-break/><text:line-break/><text:line-break/></text:p>
      <text:p text:style-name="P8"><text:soft-page-break/><draw:frame draw:style-name="fr6" draw:name="Image16" text:anchor-type="as-char" svg:width="6.6929in" svg:height="5.8307in" draw:z-index="15"><draw:image xlink:href="Pictures/1000000100000485000003F087E1E811E7BE5A14.png" xlink:type="simple" xlink:show="embed" xlink:actuate="onLoad" draw:mime-type="image/png"/></draw:frame></text:p>
      <text:p text:style-name="P10"><draw:frame draw:style-name="fr5" draw:name="Image17" text:anchor-type="as-char" svg:y="-1.5756in" svg:width="6.6209in" svg:height="3.3598in" draw:z-index="16"><draw:image xlink:href="Pictures/10000001000003E5000001FAAE1DAD2C2F4E3A47.png" xlink:type="simple" xlink:show="embed" xlink:actuate="onLoad" draw:mime-type="image/png"/></draw:frame><text:line-break/><text:line-break/><text:line-break/><text:line-break/><text:soft-page-break/><text:line-break/><text:span text:style-name="T6">Задание 6</text:span></text:p>
      <text:p text:style-name="P10"/>
      <text:p text:style-name="P10">root@eltex-practice2-v44:~# grep '^user3:' /etc/passwd</text:p>
      <text:p text:style-name="P10">user3:x:1003:1003:,,,:/home/user3:/bin/bash</text:p>
      <text:p text:style-name="P10">root@eltex-practice2-v44:~# usermod -s /usr/sbin/nologin user3</text:p>
      <text:p text:style-name="P10">root@eltex-practice2-v44:~# grep '^user3:' /etc/passwd</text:p>
      <text:p text:style-name="P10">user3:x:1003:1003:,,,:/home/user3:/usr/sbin/nologin</text:p>
      <text:p text:style-name="P10">root@eltex-practice2-v44:~# su user3</text:p>
      <text:p text:style-name="P10">This account is currently not available.</text:p>
      <text:p text:style-name="P10">root@eltex-practice2-v44:~# su -s /bin/bash user3</text:p>
      <text:p text:style-name="P10">user3@eltex-practice2-v44:/root$ whoami</text:p>
      <text:p text:style-name="P10">user3</text:p>
      <text:p text:style-name="P10">user3@eltex-practice2-v44:/root$ pwd</text:p>
      <text:p text:style-name="P10">/root</text:p>
      <text:p text:style-name="P10">user3@eltex-practice2-v44:/root$ echo $SHELL</text:p>
      <text:p text:style-name="P10">/bin/bash</text:p>
      <text:p text:style-name="P10">user3@eltex-practice2-v44:/root$ exit</text:p>
      <text:p text:style-name="P10">exit</text:p>
      <text:p text:style-name="P10">root@eltex-practice2-v44:~# echo "=== Пункт 6 выполнен ==="</text:p>
      <text:p text:style-name="P10">echo "Для user3 shell изменён на /usr/sbin/nologin."</text:p>
      <text:p text:style-name="P10">echo "Вход через su user3 без параметров не выполняется, так как установлен nologin."</text:p>
      <text:p text:style-name="P10">echo "Вход через su - user3 -s /bin/bash выполнен успешно."</text:p>
      <text:p text:style-name="P10">=== Пункт 6 выполнен ===</text:p>
      <text:p text:style-name="P10">Для user3 shell изменён на /usr/sbin/nologin.</text:p>
      <text:p text:style-name="P10">Вход через su user3 без параметров не выполняется, так как установлен nologin.</text:p>
      <text:p text:style-name="P10">Вход через su - user3 -s /bin/bash выполнен успешно.</text:p>
      <text:p text:style-name="P10">root@eltex-practice2-v44:~# </text:p>
      <text:p text:style-name="P10"><draw:frame draw:style-name="fr4" draw:name="Image18" text:anchor-type="char" svg:width="6.6929in" svg:height="3.4783in" draw:z-index="17"><draw:image xlink:href="Pictures/1000000100000390000001DA100FC95D43A4BE74.png" xlink:type="simple" xlink:show="embed" xlink:actuate="onLoad" draw:mime-type="image/png"/></draw:frame><text:soft-page-break/><text:line-break/><text:line-break/><text:span text:style-name="T7">Задание 7</text:span></text:p>
      <text:p text:style-name="P10"/>
      <text:p text:style-name="P10">root@eltex-practice2-v44:~# groupadd practice2grp</text:p>
      <text:p text:style-name="P10">root@eltex-practice2-v44:~# getent group practice2grp</text:p>
      <text:p text:style-name="P10">practice2grp:x:1004:</text:p>
      <text:p text:style-name="P10">root@eltex-practice2-v44:~# usermod -aG practice2grp user1</text:p>
      <text:p text:style-name="P10">root@eltex-practice2-v44:~# usermod -aG practice2grp user2</text:p>
      <text:p text:style-name="P10">root@eltex-practice2-v44:~# usermod -aG practice2grp user3</text:p>
      <text:p text:style-name="P10">root@eltex-practice2-v44:~# id user1</text:p>
      <text:p text:style-name="P10">uid=1001(user1) gid=1001(user1) groups=1001(user1),1004(practice2grp)</text:p>
      <text:p text:style-name="P10">root@eltex-practice2-v44:~# id user2</text:p>
      <text:p text:style-name="P10">uid=1002(user2) gid=1002(user2) groups=1002(user2),100(users),1004(practice2grp)</text:p>
      <text:p text:style-name="P10">root@eltex-practice2-v44:~# id user3</text:p>
      <text:p text:style-name="P10">uid=1003(user3) gid=1003(user3) groups=1003(user3),100(users),1004(practice2grp)</text:p>
      <text:p text:style-name="P10">root@eltex-practice2-v44:~# echo "=== Пункт 7 выполнен ==="</text:p>
      <text:p text:style-name="P10">echo "Создана группа practice2grp."</text:p>
      <text:p text:style-name="P10">echo "Пользователи user1, user2 и user3 добавлены в practice2grp как дополнительную группу."</text:p>
      <text:p text:style-name="P10">echo "Список групп пользователей user1, user2 и user3 проверен командами id и groups."</text:p>
      <text:p text:style-name="P10">=== Пункт 7 выполнен ===</text:p>
      <text:p text:style-name="P10"><text:soft-page-break/>Создана группа practice2grp.</text:p>
      <text:p text:style-name="P10">Пользователи user1, user2 и user3 добавлены в practice2grp как дополнительную группу.</text:p>
      <text:p text:style-name="P10">Список групп пользователей user1, user2 и user3 проверен командами id и groups.</text:p>
      <text:p text:style-name="P10">root@eltex-practice2-v44:~# </text:p>
      <text:p text:style-name="P10"><draw:frame draw:style-name="fr1" draw:name="Image19" text:anchor-type="as-char" svg:width="6.6929in" svg:height="3.1736in" draw:z-index="18"><draw:image xlink:href="Pictures/10000001000003430000018C0F1F8D7F96D68773.png" xlink:type="simple" xlink:show="embed" xlink:actuate="onLoad" draw:mime-type="image/png"/></draw:frame><text:line-break/></text:p>
      <text:p text:style-name="P11">Задание 8<text:line-break/><text:line-break/>root@eltex-practice2-v44:~# mkdir -p /opt/share</text:p>
      <text:p text:style-name="P11">root@eltex-practice2-v44:~# chown root:practice2grp /opt/share</text:p>
      <text:p text:style-name="P11">root@eltex-practice2-v44:~# chmod 2770 /opt/share</text:p>
      <text:p text:style-name="P11">root@eltex-practice2-v44:~# ls -ld /opt/share</text:p>
      <text:p text:style-name="P11">drwxrws--- 2 root practice2grp 4096 Jul <text:s/>8 07:52 /opt/share</text:p>
      <text:p text:style-name="P11">root@eltex-practice2-v44:~# echo "=== Пункт 8 выполнен ==="</text:p>
      <text:p text:style-name="P11">echo "Каталог /opt/share создан."</text:p>
      <text:p text:style-name="P11">echo "Группа-владелец каталога /opt/share: practice2grp."</text:p>
      <text:p text:style-name="P11">echo "На каталог /opt/share установлен SGID, права для группы rwx."</text:p>
      <text:p text:style-name="P11">=== Пункт 8 выполнен ===</text:p>
      <text:p text:style-name="P11">Каталог /opt/share создан.</text:p>
      <text:p text:style-name="P11">Группа-владелец каталога /opt/share: practice2grp.</text:p>
      <text:p text:style-name="P11">На каталог /opt/share установлен SGID, права для группы rwx.</text:p>
      <text:p text:style-name="P11">root@eltex-practice2-v44:~# </text:p>
      <text:p text:style-name="P11"><text:soft-page-break/><draw:frame draw:style-name="fr3" draw:name="Image20" text:anchor-type="as-char" svg:width="6.552in" svg:height="2.802in" draw:z-index="19"><draw:image xlink:href="Pictures/10000001000002750000010DA7F1EBA15A325F6D.png" xlink:type="simple" xlink:show="embed" xlink:actuate="onLoad" draw:mime-type="image/png"/></draw:frame></text:p>
      <text:p text:style-name="P11"/>
      <text:p text:style-name="P11">Задание 9</text:p>
      <text:p text:style-name="P11"/>
      <text:p text:style-name="P12">root@eltex-practice2-v44:~# echo 'umask 004' &gt;&gt; /home/user1/.bashrc</text:p>
      <text:p text:style-name="P12">chown user1:user1 /home/user1/.bashrc</text:p>
      <text:p text:style-name="P12">root@eltex-practice2-v44:~# tail -5 /home/user1/.bashrc</text:p>
      <text:p text:style-name="P12"><text:s text:c="2"/>elif [ -f /etc/bash_completion ]; then</text:p>
      <text:p text:style-name="P12"><text:s text:c="4"/>. /etc/bash_completion</text:p>
      <text:p text:style-name="P12"><text:s text:c="2"/>fi</text:p>
      <text:p text:style-name="P12">fi</text:p>
      <text:p text:style-name="P12">umask 004</text:p>
      <text:p text:style-name="P12">root@eltex-practice2-v44:~# umask 004</text:p>
      <text:p text:style-name="P12">root@eltex-practice2-v44:~# su - user1 -c 'umask'</text:p>
      <text:p text:style-name="P12">0002</text:p>
      <text:p text:style-name="P12">root@eltex-practice2-v44:~# su - user1 -c 'touch /opt/share/user1_umask_test.txt'</text:p>
      <text:p text:style-name="P12">root@eltex-practice2-v44:~# ls -l /opt/share/user1_umask_test.txt</text:p>
      <text:p text:style-name="P12">-rw-rw-r-- 1 user1 practice2grp 0 Jul <text:s/>8 08:00 /opt/share/user1_umask_test.txt</text:p>
      <text:p text:style-name="P12">root@eltex-practice2-v44:~# echo "=== Пункт 9 выполнен ==="</text:p>
      <text:p text:style-name="P12">echo "Для user1 перманентно задан umask 004 в /home/user1/.bashrc."</text:p>
      <text:p text:style-name="P12">echo "Новый файл user1 создан без права чтения для прочих пользователей."</text:p>
      <text:p text:style-name="P12">=== Пункт 9 выполнен ===</text:p>
      <text:p text:style-name="P12">Для user1 перманентно задан umask 004 в /home/user1/.bashrc.</text:p>
      <text:p text:style-name="P12">Новый файл user1 создан без права чтения для прочих пользователей.</text:p>
      <text:p text:style-name="P12">root@eltex-practice2-v44:~# rm -f /opt/share/user1_umask_test.txt</text:p>
      <text:p text:style-name="P12">root@eltex-practice2-v44:~# echo 'umask 004' &gt;&gt; /home/user1/.profile</text:p>
      <text:p text:style-name="P12"><text:soft-page-break/>chown user1:user1 /home/user1/.profile</text:p>
      <text:p text:style-name="P12">root@eltex-practice2-v44:~# tail -5 /home/user1/.profile</text:p>
      <text:p text:style-name="P12"># set PATH so it includes user's private bin if it exists</text:p>
      <text:p text:style-name="P12">if [ -d "$HOME/.local/bin" ] ; then</text:p>
      <text:p text:style-name="P12"><text:s text:c="4"/>PATH="$HOME/.local/bin:$PATH"</text:p>
      <text:p text:style-name="P12">fi</text:p>
      <text:p text:style-name="P12">umask 004</text:p>
      <text:p text:style-name="P12">root@eltex-practice2-v44:~# su - user1 -c 'unmask'</text:p>
      <text:p text:style-name="P12">-bash: line 1: unmask: command not found</text:p>
      <text:p text:style-name="P12">root@eltex-practice2-v44:~# su - user1 -c 'umask'</text:p>
      <text:p text:style-name="P12">0004</text:p>
      <text:p text:style-name="P12">root@eltex-practice2-v44:~# su - user1 - c 'touch /opt/share/user1_unmask_test.txt'</text:p>
      <text:p text:style-name="P12">-bash: c: No such file or directory</text:p>
      <text:p text:style-name="P12">root@eltex-practice2-v44:~# su - user1 -c 'touch /opt/share/user1_umask_test.txt'</text:p>
      <text:p text:style-name="P12">root@eltex-practice2-v44:~# ls -l /opt/share/user1_umask_test.txt</text:p>
      <text:p text:style-name="P12">-rw-rw--w- 1 user1 practice2grp 0 Jul <text:s/>8 08:09 /opt/share/user1_umask_test.txt</text:p>
      <text:p text:style-name="P12">root@eltex-practice2-v44:~# echo "=== Пункт 9 выполнен ==="</text:p>
      <text:p text:style-name="P12">echo "Для user1 перманентно задан umask 004 в /home/user1/.bashrc."</text:p>
      <text:p text:style-name="P12">echo "Новый файл user1 создан без права чтения для прочих пользователей."</text:p>
      <text:p text:style-name="P12">=== Пункт 9 выполнен ===</text:p>
      <text:p text:style-name="P12">Для user1 перманентно задан umask 004 в /home/user1/.bashrc.</text:p>
      <text:p text:style-name="P12">Новый файл user1 создан без права чтения для прочих пользователей.</text:p>
      <text:p text:style-name="P12"/>
      <text:p text:style-name="P12"><text:soft-page-break/><draw:frame draw:style-name="fr1" draw:name="Image21" text:anchor-type="as-char" svg:width="6.6929in" svg:height="7.4689in" draw:z-index="20"><draw:image xlink:href="Pictures/10000001000002F70000034FDD39E48FF9D922AF.png" xlink:type="simple" xlink:show="embed" xlink:actuate="onLoad" draw:mime-type="image/png"/></draw:frame><text:line-break/><text:line-break/><text:line-break/><text:line-break/><text:span text:style-name="T8">Задание 10</text:span></text:p>
      <text:p text:style-name="P12"/>
      <text:p text:style-name="P12">root@eltex-practice2-v44:~# rm -f /opt/share/user1_umask_test.txt</text:p>
      <text:p text:style-name="P12">root@eltex-practice2-v44:~# su - user1 -c 'echo "file from user1" &gt; /opt/share/file_user1.txt'</text:p>
      <text:p text:style-name="P12">root@eltex-practice2-v44:~# su - user2 -c 'echo "file from user2" &gt; /opt/share/file_user2.txt'</text:p>
      <text:p text:style-name="P12"><text:soft-page-break/>root@eltex-practice2-v44:~# su -s /bin/bash user3 -c 'echo "file from user3" &gt; /opt/share/file_user3.txt</text:p>
      <text:p text:style-name="P12">&gt; `</text:p>
      <text:p text:style-name="P12">&gt; ^C</text:p>
      <text:p text:style-name="P12">root@eltex-practice2-v44:~# su -s /bin/bash user3 -c 'echo "file from user3" &gt; /opt/share/file_user3.txt'</text:p>
      <text:p text:style-name="P12">root@eltex-practice2-v44:~# ls -l /opt/share</text:p>
      <text:p text:style-name="P12">total 12</text:p>
      <text:p text:style-name="P12">-rw-rw--w- 1 user1 practice2grp 16 Jul <text:s/>8 08:18 file_user1.txt</text:p>
      <text:p text:style-name="P12">-rw-rw-r-- 1 user2 practice2grp 16 Jul <text:s/>8 08:18 file_user2.txt</text:p>
      <text:p text:style-name="P12">-rw-rw-r-- 1 user3 practice2grp 16 Jul <text:s/>8 08:19 file_user3.txt</text:p>
      <text:p text:style-name="P12">root@eltex-practice2-v44:~# su - user1 -c 'rm -v /opt/share/file_user2.txt'</text:p>
      <text:p text:style-name="P12">removed '/opt/share/file_user2.txt'</text:p>
      <text:p text:style-name="P12">root@eltex-practice2-v44:~# su - user2 -c 'rm -v /opt/share/file_user3.txt'</text:p>
      <text:p text:style-name="P12">removed '/opt/share/file_user3.txt'</text:p>
      <text:p text:style-name="P12">root@eltex-practice2-v44:~# su -s /bin/bash user3 -c 'rm -v /opt/share/file_user1.txt'</text:p>
      <text:p text:style-name="P12">removed '/opt/share/file_user1.txt'</text:p>
      <text:p text:style-name="P12">root@eltex-practice2-v44:~# ls -l /opt/share</text:p>
      <text:p text:style-name="P12">total 0</text:p>
      <text:p text:style-name="P12">root@eltex-practice2-v44:~# echo "=== Пункт 10 выполнен ==="</text:p>
      <text:p text:style-name="P12">echo "Пользователи user1, user2 и user3 создали файлы в /opt/share."</text:p>
      <text:p text:style-name="P12">echo "Без sticky bit пользователи смогли удалить файлы, созданные другими пользователями."</text:p>
      <text:p text:style-name="P12">=== Пункт 10 выполнен ===</text:p>
      <text:p text:style-name="P12">Пользователи user1, user2 и user3 создали файлы в /opt/share.</text:p>
      <text:p text:style-name="P12">Без sticky bit пользователи смогли удалить файлы, созданные другими пользователями.</text:p>
      <text:p text:style-name="P12">root@eltex-practice2-v44:~# <text:line-break/><text:line-break/></text:p>
      <text:p text:style-name="P12"><text:soft-page-break/><draw:frame draw:style-name="fr1" draw:name="Image22" text:anchor-type="as-char" svg:width="6.6929in" svg:height="3.4709in" draw:z-index="21"><draw:image xlink:href="Pictures/10000001000003C8000001F606D3327C9E49828F.png" xlink:type="simple" xlink:show="embed" xlink:actuate="onLoad" draw:mime-type="image/png"/></draw:frame></text:p>
      <text:p text:style-name="P12"/>
      <text:p text:style-name="P13">Задание 11</text:p>
      <text:p text:style-name="P13"/>
      <text:p text:style-name="P13"><draw:frame draw:style-name="fr2" draw:name="Image23" text:anchor-type="char" svg:width="6.6929in" svg:height="3.1811in" draw:z-index="22"><draw:image xlink:href="Pictures/10000001000004700000021C5D91CB7BC2C84525.png" xlink:type="simple" xlink:show="embed" xlink:actuate="onLoad" draw:mime-type="image/png"/></draw:frame><text:line-break/>root@eltex-practice2-v44:~# chmod 3770 /opt/share</text:p>
      <text:p text:style-name="P13">root@eltex-practice2-v44:~# ls -ld /opt/share</text:p>
      <text:p text:style-name="P13">drwxrws--T 2 root practice2grp 4096 Jul <text:s/>8 08:20 /opt/share</text:p>
      <text:p text:style-name="P13">root@eltex-practice2-v44:~# su - user1 -c 'echo "file from user1 with sticky" &gt; /opt/share/file_user1_sticky.txt'</text:p>
      <text:p text:style-name="P13">root@eltex-practice2-v44:~# su - user2 -c 'echo "file from user2 with sticky" &gt; /opt/share/file_user2_sticky.txt'</text:p>
      <text:p text:style-name="P13">root@eltex-practice2-v44:~# su -s /bin/bash user3 -c 'echo "file from user3 with sticky" &gt; /opt/share/file_user3_sticky.txt'</text:p>
      <text:p text:style-name="P13"><text:soft-page-break/>root@eltex-practice2-v44:~# ls -l /opt/share</text:p>
      <text:p text:style-name="P13">total 12</text:p>
      <text:p text:style-name="P13">-rw-rw--w- 1 user1 practice2grp 28 Jul <text:s/>8 08:33 file_user1_sticky.txt</text:p>
      <text:p text:style-name="P13">-rw-rw-r-- 1 user2 practice2grp 28 Jul <text:s/>8 08:33 file_user2_sticky.txt</text:p>
      <text:p text:style-name="P13">-rw-rw-r-- 1 user3 practice2grp 28 Jul <text:s/>8 08:34 file_user3_sticky.txt</text:p>
      <text:p text:style-name="P13">root@eltex-practice2-v44:~# su - user1 -c 'rm -v /opt/share/file_user2_sticky.txt'</text:p>
      <text:p text:style-name="P13">rm: cannot remove '/opt/share/file_user2_sticky.txt': Operation not permitted</text:p>
      <text:p text:style-name="P13">root@eltex-practice2-v44:~# su - user2 -c 'rm -v /opt/share/file_user3_sticky.txt'</text:p>
      <text:p text:style-name="P13">rm: cannot remove '/opt/share/file_user3_sticky.txt': Operation not permitted</text:p>
      <text:p text:style-name="P13">root@eltex-practice2-v44:~# su -s /bin/bash user3 -c 'rm -v /opt/share/file_user1_sticky.txt'</text:p>
      <text:p text:style-name="P13">rm: cannot remove '/opt/share/file_user1_sticky.txt': Operation not permitted</text:p>
      <text:p text:style-name="P13">root@eltex-practice2-v44:~# ls -l /opt/share</text:p>
      <text:p text:style-name="P13">total 12</text:p>
      <text:p text:style-name="P13">-rw-rw--w- 1 user1 practice2grp 28 Jul <text:s/>8 08:33 file_user1_sticky.txt</text:p>
      <text:p text:style-name="P13">-rw-rw-r-- 1 user2 practice2grp 28 Jul <text:s/>8 08:33 file_user2_sticky.txt</text:p>
      <text:p text:style-name="P13">-rw-rw-r-- 1 user3 practice2grp 28 Jul <text:s/>8 08:34 file_user3_sticky.txt</text:p>
      <text:p text:style-name="P13">root@eltex-practice2-v44:~# echo "=== Пункт 11 выполнен ==="</text:p>
      <text:p text:style-name="P13">echo "На каталог /opt/share установлен sticky bit."</text:p>
      <text:p text:style-name="P13">echo "После установки sticky bit пользователи не смогли удалить файлы, созданные другими пользователями."</text:p>
      <text:p text:style-name="P13">=== Пункт 11 выполнен ===</text:p>
      <text:p text:style-name="P13">На каталог /opt/share установлен sticky bit.</text:p>
      <text:p text:style-name="P13">После установки sticky bit пользователи не смогли удалить файлы, созданные другими пользователями.</text:p>
      <text:p text:style-name="P13">root@eltex-practice2-v44:~# </text:p>
      <text:p text:style-name="P13"/>
      <text:p text:style-name="P14">Задание 12</text:p>
      <text:p text:style-name="P14"/>
      <text:p text:style-name="P14">root@eltex-practice2-v44:~# which dmesg</text:p>
      <text:p text:style-name="P14">/usr/bin/dmesg</text:p>
      <text:p text:style-name="P14">root@eltex-practice2-v44:~# echo 'user1 ALL=(root) NOPASSWD: /usr/bin/dmesg' &gt; /etc/sudoers.d/user1-dmesg</text:p>
      <text:p text:style-name="P14">chmod 440 /etc/sudoers.d/user1-dmesg</text:p>
      <text:p text:style-name="P14"><text:soft-page-break/>visudo -c</text:p>
      <text:p text:style-name="P14">/etc/sudoers: parsed OK</text:p>
      <text:p text:style-name="P14">/etc/sudoers.d/README: parsed OK</text:p>
      <text:p text:style-name="P14">/etc/sudoers.d/user1-dmesg: parsed OK</text:p>
      <text:p text:style-name="P14">root@eltex-practice2-v44:~# su - user1 -c 'sudo /usr/bin/dmesg | head'</text:p>
      <text:p text:style-name="P14">[ <text:s text:c="3"/>0.000000] Linux version 6.8.0-55-generic (buildd@lcy02-amd64-095) (x86_64-linux-gnu-gcc-13 (Ubuntu 13.3.0-6ubuntu2~24.04) 13.3.0, GNU ld (GNU Binutils for Ubuntu) 2.42) #57-Ubuntu SMP PREEMPT_DYNAMIC Wed Feb 12 23:42:21 UTC 2025 (Ubuntu 6.8.0-55.57-generic 6.8.12)</text:p>
      <text:p text:style-name="P14">[ <text:s text:c="3"/>0.000000] Command line: BOOT_IMAGE=/vmlinuz-6.8.0-55-generic root=/dev/mapper/ubuntu--vg-ubuntu--lv ro</text:p>
      <text:p text:style-name="P14">[ <text:s text:c="3"/>0.000000] KERNEL supported cpus:</text:p>
      <text:p text:style-name="P14">[ <text:s text:c="3"/>0.000000] <text:s text:c="2"/>Intel GenuineIntel</text:p>
      <text:p text:style-name="P14">[ <text:s text:c="3"/>0.000000] <text:s text:c="2"/>AMD AuthenticAMD</text:p>
      <text:p text:style-name="P14">[ <text:s text:c="3"/>0.000000] <text:s text:c="2"/>Hygon HygonGenuine</text:p>
      <text:p text:style-name="P14">[ <text:s text:c="3"/>0.000000] <text:s text:c="2"/>Centaur CentaurHauls</text:p>
      <text:p text:style-name="P14">[ <text:s text:c="3"/>0.000000] <text:s text:c="2"/>zhaoxin <text:s text:c="2"/>Shanghai <text:s/></text:p>
      <text:p text:style-name="P14">[ <text:s text:c="3"/>0.000000] BIOS-provided physical RAM map:</text:p>
      <text:p text:style-name="P14">[ <text:s text:c="3"/>0.000000] BIOS-e820: [mem 0x0000000000000000-0x000000000009fbff] usable</text:p>
      <text:p text:style-name="P14">root@eltex-practice2-v44:~# cat &gt; /usr/local/bin/user2_dmesg.sh &lt;&lt;'EOF'</text:p>
      <text:p text:style-name="P14">#!/bin/bash</text:p>
      <text:p text:style-name="P14">/usr/bin/dmesg</text:p>
      <text:p text:style-name="P14">EOF</text:p>
      <text:p text:style-name="P14">root@eltex-practice2-v44:~# chown root:root /usr/local/bin/user2_dmesg.sh</text:p>
      <text:p text:style-name="P14">chmod 4755 /usr/local/bin/user2_dmesg.sh</text:p>
      <text:p text:style-name="P14">root@eltex-practice2-v44:~# ls -l /usr/local/bin/user2_dmesg.sh</text:p>
      <text:p text:style-name="P14">-rwsr-xr-x 1 root root 27 Jul <text:s/>8 09:02 /usr/local/bin/user2_dmesg.sh</text:p>
      <text:p text:style-name="P14">root@eltex-practice2-v44:~# su - user2 -c '/usr/local/bin/user2_dmesg.sh | head'</text:p>
      <text:p text:style-name="P14">dmesg: read kernel buffer failed: Operation not permitted</text:p>
      <text:p text:style-name="P14">root@eltex-practice2-v44:~# version</text:p>
      <text:p text:style-name="P14">version: command not found</text:p>
      <text:p text:style-name="P14">root@eltex-practice2-v44:~# --version</text:p>
      <text:p text:style-name="P14">--version: command not found</text:p>
      <text:p text:style-name="P14">root@eltex-practice2-v44:~# linux --version</text:p>
      <text:p text:style-name="P14">Command 'linux' not found, did you mean:</text:p>
      <text:p text:style-name="P14"><text:soft-page-break/><text:s text:c="2"/>command 'linex' from snap linex (0.1.6)</text:p>
      <text:p text:style-name="P14">See 'snap info &lt;snapname&gt;' for additional versions.</text:p>
      <text:p text:style-name="P14">root@eltex-practice2-v44:~# cat /etc/os-release</text:p>
      <text:p text:style-name="P14">PRETTY_NAME="Ubuntu 24.04.2 LTS"</text:p>
      <text:p text:style-name="P14">NAME="Ubuntu"</text:p>
      <text:p text:style-name="P14">VERSION_ID="24.04"</text:p>
      <text:p text:style-name="P14">VERSION="24.04.2 LTS (Noble Numbat)"</text:p>
      <text:p text:style-name="P14">VERSION_CODENAME=noble</text:p>
      <text:p text:style-name="P14">ID=ubuntu</text:p>
      <text:p text:style-name="P14">ID_LIKE=debian</text:p>
      <text:p text:style-name="P14">HOME_URL="https://www.ubuntu.com/"</text:p>
      <text:p text:style-name="P14">SUPPORT_URL="https://help.ubuntu.com/"</text:p>
      <text:p text:style-name="P14">BUG_REPORT_URL="https://bugs.launchpad.net/ubuntu/"</text:p>
      <text:p text:style-name="P14">PRIVACY_POLICY_URL="https://www.ubuntu.com/legal/terms-and-policies/privacy-policy"</text:p>
      <text:p text:style-name="P14">UBUNTU_CODENAME=noble</text:p>
      <text:p text:style-name="P14">LOGO=ubuntu-logo</text:p>
      <text:p text:style-name="P14"/>
      <text:p text:style-name="P14">root@eltex-practice2-v44:~# cat &gt; /tmp/user2_dmesg.c &lt;&lt;'EOF'</text:p>
      <text:p text:style-name="P14">#include &lt;unistd.h&gt;</text:p>
      <text:p text:style-name="P14"/>
      <text:p text:style-name="P14">int main(void) {</text:p>
      <text:p text:style-name="P14"><text:s text:c="4"/>setuid(0);</text:p>
      <text:p text:style-name="P14"><text:s text:c="4"/>setgid(0);</text:p>
      <text:p text:style-name="P14"><text:s text:c="4"/>execl("/usr/bin/dmesg", "dmesg", NULL);</text:p>
      <text:p text:style-name="P14"><text:s text:c="4"/>return 1;</text:p>
      <text:p text:style-name="P14">}</text:p>
      <text:p text:style-name="P14">EOF</text:p>
      <text:p text:style-name="P14">root@eltex-practice2-v44:~# gcc /tmp/user2_dmesg.c -o /usr/local/bin/user2_dmesg</text:p>
      <text:p text:style-name="P14">root@eltex-practice2-v44:~# chown root:root /usr/local/bin/user2_dmesg</text:p>
      <text:p text:style-name="P14">chmod 4755 /usr/local/bin/user2_dmesg</text:p>
      <text:p text:style-name="P14">root@eltex-practice2-v44:~# ls -l /usr/local/bin/user2_dmesg</text:p>
      <text:p text:style-name="P14">-rwsr-xr-x 1 root root 16056 Jul <text:s/>8 09:33 /usr/local/bin/user2_dmesg</text:p>
      <text:p text:style-name="P14">root@eltex-practice2-v44:~# su - user2 -c '/usr/local/bin/user2_dmesg | head'</text:p>
      <text:p text:style-name="P14">[ <text:s text:c="3"/>0.000000] Linux version 6.8.0-55-generic (buildd@lcy02-amd64-095) (x86_64-linux-gnu-gcc-13 (Ubuntu 13.3.0-6ubuntu2~24.04) 13.3.0, GNU ld (GNU Binutils for Ubuntu) 2.42) #57-Ubuntu SMP <text:soft-page-break/>PREEMPT_DYNAMIC Wed Feb 12 23:42:21 UTC 2025 (Ubuntu 6.8.0-55.57-generic 6.8.12)</text:p>
      <text:p text:style-name="P14">[ <text:s text:c="3"/>0.000000] Command line: BOOT_IMAGE=/vmlinuz-6.8.0-55-generic root=/dev/mapper/ubuntu--vg-ubuntu--lv ro</text:p>
      <text:p text:style-name="P14">[ <text:s text:c="3"/>0.000000] KERNEL supported cpus:</text:p>
      <text:p text:style-name="P14">[ <text:s text:c="3"/>0.000000] <text:s text:c="2"/>Intel GenuineIntel</text:p>
      <text:p text:style-name="P14">[ <text:s text:c="3"/>0.000000] <text:s text:c="2"/>AMD AuthenticAMD</text:p>
      <text:p text:style-name="P14">[ <text:s text:c="3"/>0.000000] <text:s text:c="2"/>Hygon HygonGenuine</text:p>
      <text:p text:style-name="P14">[ <text:s text:c="3"/>0.000000] <text:s text:c="2"/>Centaur CentaurHauls</text:p>
      <text:p text:style-name="P14">[ <text:s text:c="3"/>0.000000] <text:s text:c="2"/>zhaoxin <text:s text:c="2"/>Shanghai <text:s/></text:p>
      <text:p text:style-name="P14">[ <text:s text:c="3"/>0.000000] BIOS-provided physical RAM map:</text:p>
      <text:p text:style-name="P14">[ <text:s text:c="3"/>0.000000] BIOS-e820: [mem 0x0000000000000000-0x000000000009fbff] usable</text:p>
      <text:p text:style-name="P14">root@eltex-practice2-v44:~# echo "=== Пункт 12 выполнен ==="</text:p>
      <text:p text:style-name="P14">echo "Для user1 разрешено выполнение /usr/bin/dmesg через sudo без пароля."</text:p>
      <text:p text:style-name="P14">echo "Для user2 создан bash-скрипт /usr/local/bin/user2_dmesg.sh с установленным SUID-битом."</text:p>
      <text:p text:style-name="P14">echo "На Ubuntu 24.04 SUID для bash-скриптов не повышает права, поэтому запуск bash-скрипта от user2 завершился Operation not permitted."</text:p>
      <text:p text:style-name="P14">echo "Дополнительно создан SUID-бинарник /usr/local/bin/user2_dmesg, запуск от user2 успешно вывел dmesg."</text:p>
      <text:p text:style-name="P14">=== Пункт 12 выполнен ===</text:p>
      <text:p text:style-name="P14">Для user1 разрешено выполнение /usr/bin/dmesg через sudo без пароля.</text:p>
      <text:p text:style-name="P14">Для user2 создан bash-скрипт /usr/local/bin/user2_dmesg.sh с установленным SUID-битом.</text:p>
      <text:p text:style-name="P14">На Ubuntu 24.04 SUID для bash-скриптов не повышает права, поэтому запуск bash-скрипта от user2 завершился Operation not permitted.</text:p>
      <text:p text:style-name="P14">Дополнительно создан SUID-бинарник /usr/local/bin/user2_dmesg, запуск от user2 успешно вывел dmesg.</text:p>
      <text:p text:style-name="P14">root@eltex-practice2-v44:~# </text:p>
      <text:p text:style-name="P14"><text:soft-page-break/><draw:frame draw:style-name="fr1" draw:name="Image24" text:anchor-type="as-char" svg:width="6.6929in" svg:height="2.848in" draw:z-index="23"><draw:image xlink:href="Pictures/10000001000003840000017F5EDE3C5A3E61A1DF.png" xlink:type="simple" xlink:show="embed" xlink:actuate="onLoad" draw:mime-type="image/png"/></draw:frame></text:p>
      <text:p text:style-name="P14"><draw:frame draw:style-name="fr1" draw:name="Image25" text:anchor-type="as-char" svg:width="6.6929in" svg:height="2.5354in" draw:z-index="24"><draw:image xlink:href="Pictures/100000010000073D000002BE152A908D31C78B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8T11:57:26.913208012</meta:creation-date>
    <dc:date>2026-07-08T16:55:19.329173916</dc:date>
    <meta:editing-duration>PT1H14M2S</meta:editing-duration>
    <meta:editing-cycles>3</meta:editing-cycles>
    <meta:generator>LibreOffice/7.3.7.2$Linux_X86_64 LibreOffice_project/30$Build-2</meta:generator>
    <meta:document-statistic meta:table-count="0" meta:image-count="25" meta:object-count="0" meta:page-count="26" meta:paragraph-count="412" meta:word-count="2119" meta:character-count="19257" meta:non-whitespace-character-count="17323"/>
  </office:meta>
</office:document-meta>
</file>